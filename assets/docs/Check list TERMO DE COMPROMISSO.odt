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ágrafodaLista" style:list-style-name="LFO1" style:family="paragraph">
      <style:paragraph-properties fo:margin-bottom="0in"/>
    </style:style>
    <style:style style:name="P3" style:parent-style-name="ParágrafodaLista" style:list-style-name="LFO1" style:family="paragraph">
      <style:paragraph-properties fo:margin-bottom="0in"/>
    </style:style>
    <style:style style:name="P4" style:parent-style-name="ParágrafodaLista" style:list-style-name="LFO1" style:family="paragraph">
      <style:paragraph-properties fo:margin-bottom="0in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ParágrafodaLista" style:list-style-name="LFO1" style:family="paragraph">
      <style:paragraph-properties fo:margin-bottom="0in"/>
    </style:style>
    <style:style style:name="P7" style:parent-style-name="ParágrafodaLista" style:list-style-name="LFO1" style:family="paragraph">
      <style:paragraph-properties fo:margin-bottom="0in"/>
    </style:style>
    <style:style style:name="P8" style:parent-style-name="Normal" style:family="paragraph">
      <style:paragraph-properties fo:margin-bottom="0in" fo:margin-left="0.25in">
        <style:tab-stops/>
      </style:paragraph-properties>
    </style:style>
    <style:style style:name="P9" style:parent-style-name="ParágrafodaLista" style:list-style-name="LFO1" style:family="paragraph">
      <style:paragraph-properties fo:margin-bottom="0in"/>
    </style:style>
    <style:style style:name="P10" style:parent-style-name="ParágrafodaLista" style:list-style-name="LFO1" style:family="paragraph">
      <style:paragraph-properties fo:margin-bottom="0in"/>
      <style:text-properties fo:background-color="#FFFF00"/>
    </style:style>
    <style:style style:name="P11" style:parent-style-name="ParágrafodaLista" style:list-style-name="LFO1" style:family="paragraph">
      <style:paragraph-properties fo:margin-bottom="0in"/>
    </style:style>
    <style:style style:name="T12" style:parent-style-name="Fonteparág.padrão" style:family="text">
      <style:text-properties fo:font-weight="bold" style:font-weight-asian="bold" style:font-weight-complex="bold"/>
    </style:style>
    <style:style style:name="P13" style:parent-style-name="ParágrafodaLista" style:list-style-name="LFO1" style:family="paragraph">
      <style:paragraph-properties fo:margin-bottom="0in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T15" style:parent-style-name="Fonteparág.padrão" style:family="text">
      <style:text-properties fo:background-color="#FFFF00"/>
    </style:style>
    <style:style style:name="P16" style:parent-style-name="ParágrafodaLista" style:list-style-name="LFO1" style:family="paragraph">
      <style:paragraph-properties fo:margin-bottom="0in"/>
    </style:style>
    <style:style style:name="P17" style:parent-style-name="ParágrafodaLista" style:list-style-name="LFO1" style:family="paragraph">
      <style:paragraph-properties fo:margin-bottom="0in"/>
    </style:style>
    <style:style style:name="T18" style:parent-style-name="Fonteparág.padrão" style:family="text">
      <style:text-properties fo:background-color="#FFFF00"/>
    </style:style>
    <style:style style:name="T19" style:parent-style-name="Fonteparág.padrão" style:family="text">
      <style:text-properties fo:background-color="#FFFF00"/>
    </style:style>
    <style:style style:name="P20" style:parent-style-name="ParágrafodaLista" style:list-style-name="LFO1" style:family="paragraph">
      <style:paragraph-properties fo:margin-bottom="0in"/>
    </style:style>
    <style:style style:name="P21" style:parent-style-name="ParágrafodaLista" style:list-style-name="LFO1" style:family="paragraph">
      <style:paragraph-properties fo:margin-bottom="0in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P23" style:parent-style-name="ParágrafodaLista" style:list-style-name="LFO1" style:family="paragraph">
      <style:paragraph-properties fo:margin-bottom="0in"/>
    </style:style>
    <style:style style:name="P24" style:parent-style-name="ParágrafodaLista" style:list-style-name="LFO1" style:family="paragraph">
      <style:paragraph-properties fo:margin-bottom="0in"/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P26" style:parent-style-name="ParágrafodaLista" style:family="paragraph">
      <style:paragraph-properties fo:margin-bottom="0in"/>
    </style:style>
    <style:style style:name="P27" style:parent-style-name="ParágrafodaLista" style:family="paragraph">
      <style:paragraph-properties fo:margin-bottom="0in"/>
    </style:style>
    <style:style style:name="P28" style:parent-style-name="ParágrafodaLista" style:family="paragraph">
      <style:paragraph-properties fo:margin-bottom="0in"/>
    </style:style>
    <style:style style:name="P29" style:parent-style-name="ParágrafodaLista" style:family="paragraph">
      <style:paragraph-properties fo:margin-bottom="0in"/>
    </style:style>
    <style:style style:name="P30" style:parent-style-name="ParágrafodaLista" style:family="paragraph">
      <style:paragraph-properties fo:margin-bottom="0in"/>
    </style:style>
    <style:style style:name="P31" style:parent-style-name="ParágrafodaLista" style:family="paragraph">
      <style:paragraph-properties fo:margin-bottom="0in"/>
    </style:style>
  </office:automatic-styles>
  <office:body>
    <office:text text:use-soft-page-breaks="true">
      <text:p text:style-name="P1">2. TERMO DE COMPROMISSO DO PROFISSIONAL<text:s/></text:p>
      <text:list text:style-name="LFO1" text:continue-numbering="true">
        <text:list-item>
          <text:p text:style-name="P2">Nome correto<text:s/></text:p>
        </text:list-item>
        <text:list-item>
          <text:p text:style-name="P3">Nº inscrição correto<text:s/></text:p>
        </text:list-item>
        <text:list-item>
          <text:p text:style-name="P4">Conferir se o<text:s/><text:span text:style-name="T5">CNPJ</text:span><text:s/>informado no Termo é do estabelecimento onde ele irá ingressar.</text:p>
        </text:list-item>
        <text:list-item>
          <text:p text:style-name="P6">Solicitou alteração de endereço ( ) alterar e protocolar com a<text:s/>ocorrência 86 com a observação da alteração do endereço anexando o termo de compromisso.<text:s/></text:p>
        </text:list-item>
        <text:list-item>
          <text:p text:style-name="P7">Modalidade compatível com cadastro.<text:s/></text:p>
        </text:list-item>
      </text:list>
      <text:p text:style-name="P8">- Diretor Técnico<text:line-break/>- Assistente Técnico<text:line-break/>- Substituto<text:line-break/>- DAP</text:p>
      <text:list text:style-name="LFO1" text:continue-numbering="true">
        <text:list-item>
          <text:p text:style-name="P9">Horário de atuação dentro do funcionamento ≤ 10h diárias (Caso exceda, verificar tipo de vínculo.</text:p>
        </text:list-item>
        <text:list-item>
          <text:p text:style-name="P10">Verificar intervalo de acordo com o vínculo</text:p>
        </text:list-item>
        <text:list-item>
          <text:p text:style-name="P11">Verificar se há<text:s/><text:span text:style-name="T12">conflito de horários</text:span><text:s/>entre as atividades</text:p>
        </text:list-item>
        <text:list-item>
          <text:p text:style-name="P13">Possuindo outras atividades NÃO conflitantes, verificar no<text:s/><text:span text:style-name="T14">Google Maps</text:span><text:s/>se há tempo hábil de deslocamento.<text:s/><text:span text:style-name="T15">(deverá ser de no mínimo 15 minutos)</text:span></text:p>
        </text:list-item>
        <text:list-item>
          <text:p text:style-name="P16">Intervalo declarado.</text:p>
        </text:list-item>
        <text:list-item>
          <text:p text:style-name="P17">Outras atividades<text:s/>declaradas – Caso possua, solicitar Declaração de vínculos e acrescentar a informação no cadastro do profissional<text:span text:style-name="T18">.</text:span><text:span text:style-name="T19"><text:s/>(fazer um protocolo e outros vínculos)</text:span></text:p>
        </text:list-item>
        <text:list-item>
          <text:p text:style-name="P20">Formulário emitido nos últimos 30 dias.</text:p>
        </text:list-item>
        <text:list-item>
          <text:p text:style-name="P21">Para modalidade DAP, poderá estar realizando cobertura no<text:span text:style-name="T22"><text:s/>máximo 06 profissionais</text:span><text:s/>de estabelecimentos distintos que possuam assistência farmacêutica integral.</text:p>
        </text:list-item>
        <text:list-item>
          <text:p text:style-name="P23">Verificação da nitidez Hash e código verificador</text:p>
        </text:list-item>
        <text:list-item>
          <text:p text:style-name="P24">Verificar se o profissional possui<text:s/><text:span text:style-name="T25">inscrição secundária em outro CRF,<text:s/></text:span>caso possua, solicitar declaração de responsabilidades técnicas ativas.</text:p>
        </text:list-item>
      </text:list>
      <text:p text:style-name="P26"/>
      <text:p text:style-name="P27">Para modalidade DAP (Não será<text:s/>necessário declarar horários). Caso profissional possua outro vínculo deverá declarar horários nos dias o quais não conflitarão.</text:p>
      <text:p text:style-name="P28"/>
      <text:p text:style-name="P29">Para substituto não poderá declarar horários.</text:p>
      <text:p text:style-name="P30"/>
      <text:p text:style-name="P31">Para profissionais em laboratórios e posto de coleta não será necessário declarar horário, caso possua outra atividade que conflite com o horário de funcionamento do estabelecimento poderá declarar o seu horário de assistênci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2F5496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2F5496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2F5496"/>
    </style:style>
    <style:style style:name="CitaçãoIntensa" style:display-name="Citação Intens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2F5496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ael Vicente De Souza</meta:initial-creator>
    <dc:creator>Melany Caroline De Souza Ribeiro</dc:creator>
    <meta:creation-date>2025-12-04T12:38:00Z</meta:creation-date>
    <dc:date>2025-12-10T12:39:00Z</dc:date>
    <meta:template xlink:href="Normal.dotm" xlink:type="simple"/>
    <meta:editing-cycles>6</meta:editing-cycles>
    <meta:editing-duration>PT540S</meta:editing-duration>
    <meta:document-statistic meta:page-count="1" meta:paragraph-count="3" meta:word-count="276" meta:character-count="1766" meta:row-count="12" meta:non-whitespace-character-count="1493"/>
  </office:meta>
</office:document-meta>
</file>