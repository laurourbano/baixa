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8538b" officeooo:paragraph-rsid="0018538b" style:font-size-asian="14pt" style:font-size-complex="14pt"/>
    </style:style>
    <style:style style:name="P2" style:family="paragraph" style:parent-style-name="Standard">
      <style:text-properties style:font-name="Arial" fo:font-size="14pt" officeooo:rsid="0018538b" officeooo:paragraph-rsid="0018af82" style:font-size-asian="14pt" style:font-size-complex="14pt"/>
    </style:style>
    <style:style style:name="P3" style:family="paragraph" style:parent-style-name="Standard">
      <style:text-properties style:font-name="Arial" fo:font-size="14pt" officeooo:rsid="001bb979" officeooo:paragraph-rsid="001bb979" style:font-size-asian="14pt" style:font-size-complex="14pt"/>
    </style:style>
    <style:style style:name="P4" style:family="paragraph" style:parent-style-name="Standard">
      <style:text-properties style:font-name="Arial" fo:font-size="14pt" fo:font-weight="normal" officeooo:rsid="001bb979" officeooo:paragraph-rsid="001bb979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c722f" officeooo:paragraph-rsid="001d5b7d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5b7d" officeooo:paragraph-rsid="001d5b7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1e4522" officeooo:paragraph-rsid="001e4522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officeooo:rsid="0018af82" officeooo:paragraph-rsid="0018af82" style:font-size-asian="14pt" style:font-size-complex="14pt"/>
    </style:style>
    <style:style style:name="P9" style:family="paragraph" style:parent-style-name="Standard">
      <style:text-properties style:font-name="Arial" fo:font-size="14pt" fo:font-weight="normal" officeooo:rsid="001d5b7d" officeooo:paragraph-rsid="001d5b7d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1e4522" officeooo:paragraph-rsid="001e4522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23157c" officeooo:paragraph-rsid="0023157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normal" officeooo:rsid="0023157c" officeooo:paragraph-rsid="0023157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4pt" fo:font-weight="normal" officeooo:rsid="001bb979" officeooo:paragraph-rsid="001bb97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normal" officeooo:rsid="0024022a" officeooo:paragraph-rsid="0024022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normal" officeooo:rsid="0024022a" officeooo:paragraph-rsid="002a5d1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normal" officeooo:rsid="0024b15f" officeooo:paragraph-rsid="0024b15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normal" officeooo:rsid="0024b15f" officeooo:paragraph-rsid="00252e0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normal" officeooo:rsid="0024b15f" officeooo:paragraph-rsid="002a5d1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normal" officeooo:rsid="00252e06" officeooo:paragraph-rsid="00252e0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weight="normal" officeooo:rsid="0026f798" officeooo:paragraph-rsid="0026f79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normal" officeooo:rsid="00280f85" officeooo:paragraph-rsid="00280f8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font-weight="normal" officeooo:rsid="002861e5" officeooo:paragraph-rsid="002861e5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rsid="001e4522" officeooo:paragraph-rsid="0023157c"/>
    </style:style>
    <style:style style:name="T1" style:family="text">
      <style:text-properties officeooo:rsid="0018af82"/>
    </style:style>
    <style:style style:name="T2" style:family="text">
      <style:text-properties officeooo:rsid="001d5b7d"/>
    </style:style>
    <style:style style:name="T3" style:family="text">
      <style:text-properties officeooo:rsid="001e4522"/>
    </style:style>
    <style:style style:name="T4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Arial" fo:font-size="14pt" fo:font-weight="normal" officeooo:rsid="00202d25" style:font-size-asian="14pt" style:font-weight-asian="normal" style:font-size-complex="14pt" style:font-weight-complex="normal"/>
    </style:style>
    <style:style style:name="T6" style:family="text">
      <style:text-properties officeooo:rsid="002324aa"/>
    </style:style>
    <style:style style:name="T7" style:family="text">
      <style:text-properties officeooo:rsid="00280f85"/>
    </style:style>
    <style:style style:name="T8" style:family="text">
      <style:text-properties officeooo:rsid="002861e5"/>
    </style:style>
    <style:style style:name="T9" style:family="text">
      <style:text-properties officeooo:rsid="00291637"/>
    </style:style>
    <style:style style:name="T10" style:family="text">
      <style:text-properties officeooo:rsid="00296a76"/>
    </style:style>
    <style:style style:name="T11" style:family="text">
      <style:text-properties officeooo:rsid="002a5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ários:</text:p>
      <text:p text:style-name="P1"/>
      <text:p text:style-name="P2">Horário de Funcionamento – Deverá ser <text:span text:style-name="T1">lançado os dias da semana e horários que funciona o estabelecimento.</text:span></text:p>
      <text:p text:style-name="P2"/>
      <text:p text:style-name="P8">Horário de Funcionamento – Plantão – Alguns municípios possuem Lei Municipal que regulamenta o regime de funcionamento de plantão das farmácias sediadas no município. </text:p>
      <text:p text:style-name="P1"/>
      <text:p text:style-name="P4"/>
      <text:p text:style-name="P4"/>
      <text:p text:style-name="P4">Sócios:</text:p>
      <text:p text:style-name="P4"/>
      <text:p text:style-name="P5">Sócios – Adicionar os sócios do estabelecimento:</text:p>
      <text:p text:style-name="P6">Tipos de Sócios:</text:p>
      <text:p text:style-name="P7"/>
      <text:p text:style-name="P5">- <text:span text:style-name="T2">Farmacêutico;</text:span></text:p>
      <text:p text:style-name="P5">- <text:span text:style-name="T2">Técnico;</text:span></text:p>
      <text:p text:style-name="P5">- <text:span text:style-name="T2">Não Farmacêutico;</text:span></text:p>
      <text:p text:style-name="P5">- <text:span text:style-name="T2">Empresa;</text:span></text:p>
      <text:p text:style-name="P5">- <text:span text:style-name="T2">Leigo;</text:span></text:p>
      <text:p text:style-name="P6">- Terceiro</text:p>
      <text:p text:style-name="P5"/>
      <text:p text:style-name="P7">Adicionar Sócio – Selecionar Tipo Sócio – Insc. Sócio (incluir inscrição / ou precisará cadastrar o sócio caso ainda não tenha cadastro)</text:p>
      <text:p text:style-name="P6"/>
      <text:p text:style-name="P6">Adicionar porcentagem do sócio na sociedade;</text:p>
      <text:p text:style-name="P6"/>
      <text:p text:style-name="P6">Data Entrada – data em que o sócio entrou na sociedade;</text:p>
      <text:p text:style-name="P6"/>
      <text:p text:style-name="P6">Data Saída – será usada somente quando um sócio sair do quadro societário, é lançado a data de saída <text:span text:style-name="T3">que consta no arquivamento da Junta Comercial;</text:span></text:p>
      <text:p text:style-name="P6"/>
      <text:p text:style-name="P7">Representante Legal – escolher a opção repres. Legal Sim ou Não</text:p>
      <text:p text:style-name="P7"/>
      <text:p text:style-name="P7">Cad. Leigo – Clicar em Cad. Leigo para incluir cadastro Leigo, inserir CPF, nome e endereço;</text:p>
      <text:p text:style-name="P7"/>
      <text:p text:style-name="P23"><text:span text:style-name="T4">Cad. Outra Firma – </text:span><text:span text:style-name="T5">Clicar em Cad. Outra Firma para incluir cadastro de Terceiros (Jurídica ou Física) preencher os campos para cadastramento PJ</text:span></text:p>
      <text:p text:style-name="P23"><text:span text:style-name="T5">ou PF.</text:span></text:p>
      <text:p text:style-name="P7"/>
      <text:p text:style-name="P7"/>
      <text:p text:style-name="P7"/>
      <text:p text:style-name="P11"><text:soft-page-break/></text:p>
      <text:p text:style-name="P11"/>
      <text:p text:style-name="P11">Preposto Representante Legal:</text:p>
      <text:p text:style-name="P11"/>
      <text:p text:style-name="P11">Nesse campo é cadastrado o Procurador da empresa, Diretor, Provedor, Secretário de Saúde.., conforme o tipo de estabelecimento.</text:p>
      <text:p text:style-name="P11">Para isso deverá de cadastrado somente com documento comprobatório, podendo ser, procuração, Ata de Nomeação, ou outro documento. <text:s text:c="2"/></text:p>
      <text:p text:style-name="P11"/>
      <text:p text:style-name="P12">Para adiciona<text:span text:style-name="T6">r</text:span> o Preposto, é da mesma forma de adicional o sócio, observando que <text:span text:style-name="T6">possui um campo para incluir a Data Validade Procuração. </text:span></text:p>
      <text:p text:style-name="P12"/>
      <text:p text:style-name="P12"/>
      <text:p text:style-name="P15">Status: </text:p>
      <text:p text:style-name="P15"/>
      <text:p text:style-name="P14"/>
      <text:p text:style-name="P14">Adicional Status:</text:p>
      <text:p text:style-name="P14"/>
      <text:p text:style-name="P14">Lançar o código correspondente ao tipo de procedimento: </text:p>
      <text:p text:style-name="P14"/>
      <text:p text:style-name="P14">105 - Req. Registro em Andamento;</text:p>
      <text:p text:style-name="P14">106 – Req. Reabilitação de Registro em Andamento;</text:p>
      <text:p text:style-name="P14">108 – Req. Ingresso R.T. em Andamento;</text:p>
      <text:p text:style-name="P16">130 – Req. Alteração de Horário em Andamento; </text:p>
      <text:p text:style-name="P16"/>
      <text:p text:style-name="P16">ou outro código correspondente ao requerimento</text:p>
      <text:p text:style-name="P16"/>
      <text:p text:style-name="P17">Data Plenária - Lançar a data da Plenária em que o procedimento será</text:p>
      <text:p text:style-name="P18">referendado</text:p>
      <text:p text:style-name="P18"/>
      <text:p text:style-name="P18">************************************************* </text:p>
      <text:p text:style-name="P17"/>
      <text:p text:style-name="P17"/>
      <text:p text:style-name="P17"/>
      <text:p text:style-name="P17"/>
      <text:p text:style-name="P19">Responsáveis Técnicos:</text:p>
      <text:p text:style-name="P19"/>
      <text:p text:style-name="P19">Adicionar RT: </text:p>
      <text:p text:style-name="P19"/>
      <text:p text:style-name="P19">- Selecionar Tipo de <text:s/>RT (Farmacêutico);</text:p>
      <text:p text:style-name="P20">- Insc. RT (pesquisar profissional por inscrição, nome, CPF ..);</text:p>
      <text:p text:style-name="P20">- Selecionar Contrato Tipo (Assistente Técnico / Diretor Técnico / Substituto / DAP - Declaração Ativ. Prof.;</text:p>
      <text:p text:style-name="P20">- Data Contrato – Lançar a data da Plenária;</text:p>
      <text:p text:style-name="P20"><text:soft-page-break/>- Data Vencto Contrato – quando o vínculo for contrato de prestação de Serviços com prazo final, lançar a data do término do contrato;</text:p>
      <text:p text:style-name="P20">- Situação RT – Selecionar o tipo de vínculo do profissional com a empresa (Contratado / Sócio / <text:span text:style-name="T7">T</text:span>erceirizado / Proprietário / <text:span text:style-name="T7">Estatutário / Servidor Público / Arrendatário .. ou outro correspondente ao vínculo apresentado);</text:span></text:p>
      <text:p text:style-name="P20">- <text:span text:style-name="T7">Tipo Vínculo RT (CTPS, Contrato de Prestação de Serviços, Contrato de Terceirização ….)</text:span></text:p>
      <text:p text:style-name="P20"/>
      <text:p text:style-name="P21"/>
      <text:p text:style-name="P22">Horário de RT:</text:p>
      <text:p text:style-name="P22"/>
      <text:p text:style-name="P21"><text:span text:style-name="T8">A</text:span>dicionar Horário:</text:p>
      <text:p text:style-name="P21"/>
      <text:p text:style-name="P21">- <text:span text:style-name="T8">I</text:span>ncluir hor<text:span text:style-name="T8">á</text:span>rio da RT (<text:span text:style-name="T8">incluir horários e dias da semana);</text:span></text:p>
      <text:p text:style-name="P21">- <text:span text:style-name="T8">Plantão de RT (Para estabelecimentos que possuem horário de plantão regulamentado pela prefeitura do município, os profissionais devem prestar assistência nos dias e horários de plantão, nesse caso </text:span><text:span text:style-name="T9">deve ser lançado nesse campo os horários e dias da semana da assistência);</text:span></text:p>
      <text:p text:style-name="P21">- <text:span text:style-name="T10">Horário Alternativo (para estabelecimentos que possuem mais de um profissional, que em dias da semana, declaram horários diferentes, porém um completando a assistência do outro, dessa forma, podem fazer o revezamento de horários de assistência)</text:span></text:p>
      <text:p text:style-name="P21"/>
      <text:p text:style-name="P21"/>
      <text:p text:style-name="P20"/>
      <text:p text:style-name="P19"/>
      <text:p text:style-name="P19"/>
      <text:p text:style-name="P19"/>
      <text:p text:style-name="P14"/>
      <text:p text:style-name="P14"/>
      <text:p text:style-name="P14"/>
      <text:p text:style-name="P6"/>
      <text:p text:style-name="P6"/>
      <text:p text:style-name="P6"/>
      <text:p text:style-name="P6"/>
      <text:p text:style-name="P5"/>
      <text:p text:style-name="P5"/>
      <text:p text:style-name="P5"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3T09:36:16.054000000</meta:creation-date>
    <dc:date>2021-08-14T12:15:53.140000000</dc:date>
    <meta:editing-duration>PT24M45S</meta:editing-duration>
    <meta:editing-cycles>7</meta:editing-cycles>
    <meta:generator>LibreOffice/6.4.6.2$Windows_x86 LibreOffice_project/0ce51a4fd21bff07a5c061082cc82c5ed232f115</meta:generator>
    <meta:document-statistic meta:table-count="0" meta:image-count="0" meta:object-count="0" meta:page-count="3" meta:paragraph-count="50" meta:word-count="502" meta:character-count="3312" meta:non-whitespace-character-count="2830"/>
  </office:meta>
</office:document-meta>
</file>