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paragraph-properties fo:margin-bottom="0in" fo:line-height="100%"/>
    </style:style>
    <style:style style:name="T16" style:parent-style-name="Fonteparág.padrão" style:family="text">
      <style:text-properties style:font-name-complex="Calibri" fo:font-size="10pt" style:font-size-asian="10pt" style:font-size-complex="10pt"/>
    </style:style>
    <style:style style:name="T17" style:parent-style-name="Fonteparág.padrão" style:family="text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" style:parent-style-name="Normal" style:family="paragraph">
      <style:paragraph-properties fo:margin-bottom="0in" fo:line-height="100%"/>
    </style:style>
    <style:style style:name="T22" style:parent-style-name="Fonteparág.padrão" style:family="text">
      <style:text-properties style:font-name-complex="Calibri" fo:font-size="10pt" style:font-size-asian="10pt" style:font-size-complex="10pt"/>
    </style:style>
    <style:style style:name="T23" style:parent-style-name="Fonteparág.padrã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style:font-name-complex="Calibri" fo:font-size="10pt" style:font-size-asian="10pt" style:font-size-complex="10pt"/>
    </style:style>
    <style:style style:name="T25" style:parent-style-name="Fonteparág.padrã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style:font-name-complex="Calibri" fo:font-size="10pt" style:font-size-asian="10pt" style:font-size-complex="10pt"/>
    </style:style>
    <style:style style:name="T27" style:parent-style-name="Fonteparág.padrão" style:family="text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T28" style:parent-style-name="Fonteparág.padrão" style:family="text">
      <style:text-properties style:font-name-complex="Calibri" fo:font-size="10pt" style:font-size-asian="10pt" style:font-size-complex="10pt"/>
    </style:style>
    <style:style style:name="T29" style:parent-style-name="Fonteparág.padrão" style:family="text">
      <style:text-properties style:font-name-complex="Calibri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</style:style>
    <style:style style:name="T32" style:parent-style-name="Fonteparág.padrão" style:family="text">
      <style:text-properties style:font-name-complex="Calibri" fo:font-size="10pt" style:font-size-asian="10pt" style:font-size-complex="10pt"/>
    </style:style>
    <style:style style:name="T33" style:parent-style-name="Fonteparág.padrã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34" style:parent-style-name="Fonteparág.padrão" style:family="text">
      <style:text-properties style:font-name-complex="Calibri" fo:font-size="10pt" style:font-size-asian="10pt" style:font-size-complex="10pt"/>
    </style:style>
    <style:style style:name="P35" style:parent-style-name="Normal" style:family="paragraph">
      <style:paragraph-properties fo:margin-bottom="0in" fo:line-height="100%"/>
    </style:style>
    <style:style style:name="T36" style:parent-style-name="Fonteparág.padrão" style:family="text">
      <style:text-properties style:font-name-complex="Calibri" fo:font-size="10pt" style:font-size-asian="10pt" style:font-size-complex="10pt"/>
    </style:style>
    <style:style style:name="T37" style:parent-style-name="Fonteparág.padrão" style:family="text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-complex="Calibri" fo:font-size="10pt" style:font-size-asian="10pt" style:font-size-complex="10pt"/>
    </style:style>
    <style:style style:name="T39" style:parent-style-name="Fonteparág.padrão" style:family="text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T40" style:parent-style-name="Fonteparág.padrão" style:family="text">
      <style:text-properties style:font-name-complex="Calibri" fo:font-size="10pt" style:font-size-asian="10pt" style:font-size-complex="10pt"/>
    </style:style>
    <style:style style:name="P4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42" style:parent-style-name="Normal" style:family="paragraph">
      <style:paragraph-properties style:vertical-align="auto" fo:margin-bottom="0in" fo:line-height="100%"/>
      <style:text-properties fo:hyphenate="true"/>
    </style:style>
    <style:style style:name="T43" style:parent-style-name="Fonteparág.padrã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44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45" style:parent-style-name="Normal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46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47" style:parent-style-name="Normal" style:family="paragraph">
      <style:paragraph-properties style:vertical-align="auto" fo:margin-bottom="0in" fo:line-height="100%"/>
      <style:text-properties fo:hyphenate="true"/>
    </style:style>
    <style:style style:name="T48" style:parent-style-name="Fonteparág.padrão" style:family="text">
      <style:text-properties style:font-name-complex="Calibri" fo:font-size="10pt" style:font-size-asian="10pt" style:font-size-complex="10pt"/>
    </style:style>
    <style:style style:name="T49" style:parent-style-name="Fonteparág.padrã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3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6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P5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60" style:parent-style-name="ParágrafodaLista" style:list-style-name="LFO1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61" style:parent-style-name="ParágrafodaLista" style:list-style-name="LFO1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62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3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4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6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70" style:parent-style-name="ParágrafodaLista" style:list-style-name="LFO2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78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6" style:parent-style-name="Normal" style:family="paragraph">
      <style:paragraph-properties fo:margin-bottom="0in" fo:line-height="100%"/>
    </style:style>
    <style:style style:name="T87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88" style:parent-style-name="Fonteparág.padrão" style:family="text">
      <style:text-properties style:font-name-complex="Calibri" fo:font-size="10pt" style:font-size-asian="10pt" style:font-size-complex="10pt"/>
    </style:style>
    <style:style style:name="P8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90" style:parent-style-name="ParágrafodaLista" style:family="paragraph">
      <style:paragraph-properties style:vertical-align="auto" fo:margin-bottom="0in" fo:line-height="100%"/>
      <style:text-properties style:font-name-complex="Calibri" fo:font-size="10pt" style:font-size-asian="10pt" style:font-size-complex="10pt" fo:hyphenate="true"/>
    </style:style>
    <style:style style:name="P91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92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93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94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95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96" style:parent-style-name="ParágrafodaLista" style:family="paragraph">
      <style:paragraph-properties fo:margin-bottom="0in" fo:line-height="100%"/>
    </style:style>
    <style:style style:name="T97" style:parent-style-name="Fonteparág.padrão" style:family="text">
      <style:text-properties style:font-name-complex="Calibri" fo:font-size="10pt" style:font-size-asian="10pt" style:font-size-complex="10pt" fo:background-color="#FFFF00"/>
    </style:style>
    <style:style style:name="P98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99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0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1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2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3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0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0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0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2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3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4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17" style:parent-style-name="ParágrafodaLista" style:list-style-name="LFO2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1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2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2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22" style:parent-style-name="Normal" style:family="paragraph">
      <style:paragraph-properties fo:margin-bottom="0in" fo:line-height="100%"/>
    </style:style>
    <style:style style:name="T123" style:parent-style-name="Fonteparág.padrão" style:family="text">
      <style:text-properties style:font-name-complex="Calibri" fo:font-size="10pt" style:font-size-asian="10pt" style:font-size-complex="10pt"/>
    </style:style>
    <style:style style:name="T124" style:parent-style-name="Fonteparág.padrão" style:family="text">
      <style:text-properties style:font-name-complex="Calibri" fo:font-size="10pt" style:font-size-asian="10pt" style:font-size-complex="10pt" fo:background-color="#FFFF00"/>
    </style:style>
    <style:style style:name="P12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26" style:parent-style-name="ParágrafodaLista" style:list-style-name="LFO3" style:family="paragraph">
      <style:paragraph-properties fo:margin-bottom="0in" fo:line-height="100%"/>
    </style:style>
    <style:style style:name="T127" style:parent-style-name="Fonteparág.padrão" style:family="text">
      <style:text-properties style:font-name-complex="Calibri" fo:font-size="10pt" style:font-size-asian="10pt" style:font-size-complex="10pt"/>
    </style:style>
    <style:style style:name="T128" style:parent-style-name="Fonteparág.padrão" style:family="text">
      <style:text-properties style:font-name-complex="Calibri" fo:font-size="10pt" style:font-size-asian="10pt" style:font-size-complex="10pt" fo:background-color="#FFFF00"/>
    </style:style>
    <style:style style:name="P129" style:parent-style-name="ParágrafodaLista" style:list-style-name="LFO3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3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31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2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3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4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5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6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7" style:parent-style-name="Normal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38" style:parent-style-name="Normal" style:family="paragraph">
      <style:paragraph-properties fo:line-height="100%"/>
    </style:style>
    <style:style style:name="T139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0" style:parent-style-name="Fonteparág.padrão" style:family="text">
      <style:text-properties style:font-name-complex="Calibri" fo:font-size="10pt" style:font-size-asian="10pt" style:font-size-complex="10pt"/>
    </style:style>
    <style:style style:name="P14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2" style:parent-style-name="ParágrafodaLista" style:family="paragraph">
      <style:paragraph-properties style:vertical-align="auto" fo:margin-bottom="0in" fo:line-height="100%"/>
      <style:text-properties style:font-name-complex="Calibri" fo:font-size="10pt" style:font-size-asian="10pt" style:font-size-complex="10pt" fo:hyphenate="true"/>
    </style:style>
    <style:style style:name="P143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144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145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46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47" style:parent-style-name="ParágrafodaLista" style:family="paragraph">
      <style:paragraph-properties fo:margin-bottom="0in" fo:line-height="100%"/>
    </style:style>
    <style:style style:name="T148" style:parent-style-name="Fonteparág.padrão" style:family="text">
      <style:text-properties style:font-name-complex="Calibri" fo:font-size="10pt" style:font-size-asian="10pt" style:font-size-complex="10pt"/>
    </style:style>
    <style:style style:name="T149" style:parent-style-name="Fonteparág.padrão" style:family="text">
      <style:text-properties style:font-name-complex="Calibri" fo:font-size="10pt" style:font-size-asian="10pt" style:font-size-complex="10pt" fo:background-color="#FFFF00"/>
    </style:style>
    <style:style style:name="P150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1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2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3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4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5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6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7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5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6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6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62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63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64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6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6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6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6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6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7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7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7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7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74" style:parent-style-name="Normal" style:family="paragraph">
      <style:paragraph-properties fo:margin-bottom="0in" fo:line-height="100%" fo:margin-left="0.4895in" fo:text-indent="-0.4895in">
        <style:tab-stops/>
      </style:paragraph-properties>
      <style:text-properties style:font-name-complex="Calibri" fo:font-size="10pt" style:font-size-asian="10pt" style:font-size-complex="10pt"/>
    </style:style>
    <style:style style:name="P175" style:parent-style-name="ParágrafodaLista" style:list-style-name="LFO4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76" style:parent-style-name="ParágrafodaLista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77" style:parent-style-name="ParágrafodaLista" style:list-style-name="LFO4" style:family="paragraph">
      <style:paragraph-properties fo:margin-bottom="0in" fo:line-height="100%"/>
    </style:style>
    <style:style style:name="T178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79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 fo:background-color="#FFFF00"/>
    </style:style>
    <style:style style:name="T180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1" style:parent-style-name="ParágrafodaLista" style:list-style-name="LFO4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2" style:parent-style-name="ParágrafodaLista" style:list-style-name="LFO4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3" style:parent-style-name="ParágrafodaLista" style:list-style-name="LFO4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4" style:parent-style-name="ParágrafodaLista" style:list-style-name="LFO4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5" style:parent-style-name="ParágrafodaLista" style:list-style-name="LFO4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6" style:parent-style-name="ParágrafodaLista" style:list-style-name="LFO4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87" style:parent-style-name="ParágrafodaLista" style:list-style-name="LFO4" style:family="paragraph">
      <style:paragraph-properties fo:margin-bottom="0in" fo:line-height="100%"/>
    </style:style>
    <style:style style:name="T188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89" style:parent-style-name="Fonteparág.padrão" style:family="text">
      <style:text-properties style:font-name-complex="Calibri" fo:font-size="10pt" style:font-size-asian="10pt" style:font-size-complex="10pt"/>
    </style:style>
    <style:style style:name="P190" style:parent-style-name="ParágrafodaLista" style:family="paragraph">
      <style:paragraph-properties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91" style:parent-style-name="ParágrafodaLista" style:family="paragraph">
      <style:paragraph-properties style:vertical-align="auto" fo:margin-bottom="0in" fo:line-height="100%"/>
      <style:text-properties style:font-name-complex="Calibri" fo:font-size="10pt" style:font-size-asian="10pt" style:font-size-complex="10pt" fo:hyphenate="true"/>
    </style:style>
    <style:style style:name="P192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193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194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5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6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7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8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9" style:parent-style-name="ParágrafodaLista" style:family="paragraph">
      <style:paragraph-properties fo:margin-bottom="0in" fo:line-height="100%"/>
    </style:style>
    <style:style style:name="T200" style:parent-style-name="Fonteparág.padrão" style:family="text">
      <style:text-properties style:font-name-complex="Calibri" fo:font-size="10pt" style:font-size-asian="10pt" style:font-size-complex="10pt" fo:background-color="#FFFF00"/>
    </style:style>
    <style:style style:name="P201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2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3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4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5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6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7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8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09" style:parent-style-name="ParágrafodaLista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1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1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2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2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2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2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5" style:parent-style-name="Normal" style:family="paragraph">
      <style:paragraph-properties fo:margin-bottom="0in" fo:line-height="100%"/>
    </style:style>
    <style:style style:name="T236" style:parent-style-name="Fonteparág.padrão" style:family="text">
      <style:text-properties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37" style:parent-style-name="Fonteparág.padrão" style:family="text">
      <style:text-properties style:font-name-complex="Calibri" fo:font-size="10pt" style:font-size-asian="10pt" style:font-size-complex="10pt"/>
    </style:style>
    <style:style style:name="P23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39" style:parent-style-name="ParágrafodaLista" style:family="paragraph">
      <style:paragraph-properties style:vertical-align="auto" fo:margin-bottom="0in" fo:line-height="100%"/>
      <style:text-properties style:font-name-complex="Calibri" fo:font-size="10pt" style:font-size-asian="10pt" style:font-size-complex="10pt" fo:hyphenate="true"/>
    </style:style>
    <style:style style:name="P240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241" style:parent-style-name="ParágrafodaLista" style:family="paragraph">
      <style:paragraph-properties style:vertical-align="auto" fo:margin-bottom="0in" fo:line-height="100%"/>
      <style:text-properties style:font-name-complex="Calibri" fo:color="#4472C4" fo:font-size="10pt" style:font-size-asian="10pt" style:font-size-complex="10pt" fo:hyphenate="true"/>
    </style:style>
    <style:style style:name="P242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43" style:parent-style-name="ParágrafodaLista" style:family="paragraph">
      <style:paragraph-properties fo:margin-bottom="0in" fo:line-height="100%"/>
    </style:style>
    <style:style style:name="T244" style:parent-style-name="Fonteparág.padrão" style:family="text">
      <style:text-properties style:font-name-complex="Calibri" fo:font-size="10pt" style:font-size-asian="10pt" style:font-size-complex="10pt"/>
    </style:style>
    <style:style style:name="T245" style:parent-style-name="Fonteparág.padrão" style:family="text">
      <style:text-properties style:font-name-complex="Calibri" fo:font-size="10pt" style:font-size-asian="10pt" style:font-size-complex="10pt" fo:background-color="#FFFF00"/>
    </style:style>
    <style:style style:name="P246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47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48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49" style:parent-style-name="ParágrafodaLista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250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2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3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4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5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60" style:parent-style-name="ParágrafodaLista" style:list-style-name="LFO6" style:family="paragraph">
      <style:paragraph-properties fo:margin-bottom="0in"/>
    </style:style>
    <style:style style:name="P261" style:parent-style-name="ParágrafodaLista" style:list-style-name="LFO6" style:family="paragraph">
      <style:paragraph-properties fo:margin-bottom="0in"/>
    </style:style>
    <style:style style:name="P262" style:parent-style-name="ParágrafodaLista" style:list-style-name="LFO6" style:family="paragraph">
      <style:paragraph-properties fo:margin-bottom="0in"/>
    </style:style>
    <style:style style:name="T263" style:parent-style-name="Fonteparág.padrão" style:family="text">
      <style:text-properties fo:font-weight="bold" style:font-weight-asian="bold" style:font-weight-complex="bold"/>
    </style:style>
    <style:style style:name="P264" style:parent-style-name="ParágrafodaLista" style:list-style-name="LFO6" style:family="paragraph">
      <style:paragraph-properties fo:margin-bottom="0in"/>
    </style:style>
    <style:style style:name="P265" style:parent-style-name="ParágrafodaLista" style:list-style-name="LFO6" style:family="paragraph">
      <style:paragraph-properties fo:margin-bottom="0in"/>
    </style:style>
    <style:style style:name="P266" style:parent-style-name="Normal" style:family="paragraph">
      <style:paragraph-properties fo:margin-bottom="0in" fo:margin-left="0.25in">
        <style:tab-stops/>
      </style:paragraph-properties>
    </style:style>
    <style:style style:name="P267" style:parent-style-name="ParágrafodaLista" style:list-style-name="LFO6" style:family="paragraph">
      <style:paragraph-properties fo:margin-bottom="0in"/>
    </style:style>
    <style:style style:name="P268" style:parent-style-name="ParágrafodaLista" style:list-style-name="LFO6" style:family="paragraph">
      <style:paragraph-properties fo:margin-bottom="0in"/>
      <style:text-properties fo:background-color="#FFFF00"/>
    </style:style>
    <style:style style:name="P269" style:parent-style-name="ParágrafodaLista" style:list-style-name="LFO6" style:family="paragraph">
      <style:paragraph-properties fo:margin-bottom="0in"/>
    </style:style>
    <style:style style:name="T270" style:parent-style-name="Fonteparág.padrão" style:family="text">
      <style:text-properties fo:font-weight="bold" style:font-weight-asian="bold" style:font-weight-complex="bold"/>
    </style:style>
    <style:style style:name="P271" style:parent-style-name="ParágrafodaLista" style:list-style-name="LFO6" style:family="paragraph">
      <style:paragraph-properties fo:margin-bottom="0in"/>
    </style:style>
    <style:style style:name="T272" style:parent-style-name="Fonteparág.padrão" style:family="text">
      <style:text-properties fo:font-weight="bold" style:font-weight-asian="bold" style:font-weight-complex="bold"/>
    </style:style>
    <style:style style:name="T273" style:parent-style-name="Fonteparág.padrão" style:family="text">
      <style:text-properties fo:background-color="#FFFF00"/>
    </style:style>
    <style:style style:name="P274" style:parent-style-name="ParágrafodaLista" style:list-style-name="LFO6" style:family="paragraph">
      <style:paragraph-properties fo:margin-bottom="0in"/>
    </style:style>
    <style:style style:name="P275" style:parent-style-name="ParágrafodaLista" style:list-style-name="LFO6" style:family="paragraph">
      <style:paragraph-properties fo:margin-bottom="0in"/>
    </style:style>
    <style:style style:name="T276" style:parent-style-name="Fonteparág.padrão" style:family="text">
      <style:text-properties fo:background-color="#FFFF00"/>
    </style:style>
    <style:style style:name="P277" style:parent-style-name="ParágrafodaLista" style:list-style-name="LFO6" style:family="paragraph">
      <style:paragraph-properties fo:margin-bottom="0in"/>
    </style:style>
    <style:style style:name="P278" style:parent-style-name="ParágrafodaLista" style:list-style-name="LFO6" style:family="paragraph">
      <style:paragraph-properties fo:margin-bottom="0in"/>
    </style:style>
    <style:style style:name="T279" style:parent-style-name="Fonteparág.padrão" style:family="text">
      <style:text-properties fo:font-weight="bold" style:font-weight-asian="bold" style:font-weight-complex="bold"/>
    </style:style>
    <style:style style:name="P280" style:parent-style-name="ParágrafodaLista" style:list-style-name="LFO6" style:family="paragraph">
      <style:paragraph-properties fo:margin-bottom="0in"/>
    </style:style>
    <style:style style:name="P281" style:parent-style-name="ParágrafodaLista" style:list-style-name="LFO6" style:family="paragraph">
      <style:paragraph-properties fo:margin-bottom="0in"/>
    </style:style>
    <style:style style:name="T282" style:parent-style-name="Fonteparág.padrão" style:family="text">
      <style:text-properties fo:font-weight="bold" style:font-weight-asian="bold" style:font-weight-complex="bold"/>
    </style:style>
    <style:style style:name="P283" style:parent-style-name="ParágrafodaLista" style:family="paragraph">
      <style:paragraph-properties fo:margin-bottom="0in"/>
    </style:style>
    <style:style style:name="P284" style:parent-style-name="ParágrafodaLista" style:family="paragraph">
      <style:paragraph-properties fo:margin-bottom="0in"/>
    </style:style>
    <style:style style:name="P285" style:parent-style-name="ParágrafodaLista" style:family="paragraph">
      <style:paragraph-properties fo:margin-bottom="0in"/>
    </style:style>
    <style:style style:name="P286" style:parent-style-name="ParágrafodaLista" style:family="paragraph">
      <style:paragraph-properties fo:margin-bottom="0in"/>
    </style:style>
    <style:style style:name="P287" style:parent-style-name="ParágrafodaLista" style:family="paragraph">
      <style:paragraph-properties fo:margin-bottom="0in"/>
    </style:style>
    <style:style style:name="P288" style:parent-style-name="ParágrafodaLista" style:family="paragraph">
      <style:paragraph-properties fo:margin-bottom="0in"/>
    </style:style>
    <style:style style:name="P28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290" style:parent-style-name="Standard" style:list-style-name="LFO7" style:family="paragraph">
      <style:paragraph-properties fo:line-height="115%"/>
    </style:style>
    <style:style style:name="P291" style:parent-style-name="Textbody" style:family="paragraph">
      <style:paragraph-properties fo:margin-bottom="0.018in" fo:text-indent="0.0833in"/>
    </style:style>
    <style:style style:name="P292" style:parent-style-name="Textbody" style:list-style-name="LFO7" style:family="paragraph">
      <style:paragraph-properties fo:margin-bottom="0.018in"/>
    </style:style>
    <style:style style:name="P293" style:parent-style-name="Textbody" style:list-style-name="LFO7" style:family="paragraph">
      <style:paragraph-properties fo:margin-bottom="0.018in"/>
    </style:style>
    <style:style style:name="P294" style:parent-style-name="Textbody" style:list-style-name="LFO7" style:family="paragraph">
      <style:paragraph-properties fo:margin-bottom="0.018in"/>
    </style:style>
    <style:style style:name="P295" style:parent-style-name="Textbody" style:family="paragraph">
      <style:paragraph-properties fo:margin-bottom="0.018in" fo:margin-left="0.25in">
        <style:tab-stops/>
      </style:paragraph-properties>
    </style:style>
    <style:style style:name="P296" style:parent-style-name="Textbody" style:family="paragraph">
      <style:paragraph-properties fo:margin-bottom="0.018in"/>
    </style:style>
    <style:style style:name="P297" style:parent-style-name="Textbody" style:list-style-name="LFO7" style:family="paragraph">
      <style:paragraph-properties fo:margin-bottom="0.018in"/>
    </style:style>
    <style:style style:name="P298" style:parent-style-name="Textbody" style:list-style-name="LFO7" style:family="paragraph">
      <style:paragraph-properties fo:margin-bottom="0.018in"/>
    </style:style>
    <style:style style:name="P299" style:parent-style-name="Textbody" style:list-style-name="LFO7" style:family="paragraph">
      <style:paragraph-properties fo:margin-bottom="0.018in"/>
    </style:style>
    <style:style style:name="P300" style:parent-style-name="Textbody" style:family="paragraph">
      <style:paragraph-properties fo:margin-bottom="0.018in"/>
    </style:style>
    <style:style style:name="P301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2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3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4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5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6" style:parent-style-name="Textbody" style:family="paragraph">
      <style:paragraph-properties fo:margin-bottom="0.018in"/>
    </style:style>
    <style:style style:name="P307" style:parent-style-name="Textbody" style:family="paragraph">
      <style:paragraph-properties fo:margin-bottom="0.018in" fo:margin-left="0.25in">
        <style:tab-stops/>
      </style:paragraph-properties>
    </style:style>
    <style:style style:name="P308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09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0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4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5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6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7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8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9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0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4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5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6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7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8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9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30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3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3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3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34" style:parent-style-name="Textbody" style:list-style-name="LFO7" style:family="paragraph">
      <style:paragraph-properties fo:margin-bottom="0.018in"/>
    </style:style>
    <style:style style:name="P335" style:parent-style-name="Textbody" style:list-style-name="LFO7" style:family="paragraph">
      <style:paragraph-properties fo:margin-bottom="0.018in"/>
    </style:style>
    <style:style style:name="P336" style:parent-style-name="Textbody" style:list-style-name="LFO7" style:family="paragraph">
      <style:paragraph-properties fo:margin-bottom="0.018in"/>
    </style:style>
    <style:style style:name="P337" style:parent-style-name="Textbody" style:list-style-name="LFO7" style:family="paragraph">
      <style:paragraph-properties fo:margin-bottom="0.018in"/>
    </style:style>
    <style:style style:name="P338" style:parent-style-name="Textbody" style:family="paragraph">
      <style:paragraph-properties fo:margin-bottom="0.018in" fo:margin-left="0.25in">
        <style:tab-stops/>
      </style:paragraph-properties>
    </style:style>
    <style:style style:name="P339" style:parent-style-name="Textbody" style:family="paragraph">
      <style:paragraph-properties fo:margin-bottom="0.018in" fo:margin-left="0.25in">
        <style:tab-stops/>
      </style:paragraph-properties>
    </style:style>
    <style:style style:name="P340" style:parent-style-name="Textbody" style:family="paragraph">
      <style:paragraph-properties fo:margin-bottom="0.018in" fo:margin-left="0.25in">
        <style:tab-stops/>
      </style:paragraph-properties>
    </style:style>
    <style:style style:name="P34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4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43" style:parent-style-name="Textbody" style:list-style-name="LFO7" style:family="paragraph">
      <style:paragraph-properties fo:margin-bottom="0.018in"/>
    </style:style>
    <style:style style:name="P344" style:parent-style-name="Textbody" style:list-style-name="LFO7" style:family="paragraph">
      <style:paragraph-properties fo:margin-bottom="0.018in"/>
    </style:style>
    <style:style style:name="P345" style:parent-style-name="Textbody" style:list-style-name="LFO7" style:family="paragraph">
      <style:paragraph-properties fo:margin-bottom="0.018in"/>
    </style:style>
    <style:style style:name="P346" style:parent-style-name="Textbody" style:list-style-name="LFO7" style:family="paragraph">
      <style:paragraph-properties fo:margin-bottom="0.018in"/>
    </style:style>
    <style:style style:name="P347" style:parent-style-name="Textbody" style:family="paragraph">
      <style:paragraph-properties fo:margin-bottom="0.018in"/>
    </style:style>
    <style:style style:name="P348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4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5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51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52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5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54" style:parent-style-name="Textbody" style:family="paragraph">
      <style:paragraph-properties fo:margin-bottom="0.018in"/>
    </style:style>
    <style:style style:name="P355" style:parent-style-name="Textbody" style:family="paragraph">
      <style:paragraph-properties fo:margin-bottom="0.018in"/>
    </style:style>
    <style:style style:name="P356" style:parent-style-name="Textbody" style:family="paragraph">
      <style:paragraph-properties fo:margin-bottom="0.018in"/>
    </style:style>
    <style:style style:name="P357" style:parent-style-name="Textbody" style:family="paragraph">
      <style:paragraph-properties fo:margin-bottom="0.018in"/>
    </style:style>
    <style:style style:name="P358" style:parent-style-name="Textbody" style:family="paragraph">
      <style:paragraph-properties fo:margin-bottom="0.018in"/>
    </style:style>
    <style:style style:name="P359" style:parent-style-name="Textbody" style:family="paragraph">
      <style:paragraph-properties fo:margin-bottom="0.018in"/>
    </style:style>
    <style:style style:name="P360" style:parent-style-name="Textbody" style:family="paragraph">
      <style:paragraph-properties fo:margin-bottom="0.018in"/>
    </style:style>
    <style:style style:name="P361" style:parent-style-name="Textbody" style:family="paragraph">
      <style:paragraph-properties fo:margin-bottom="0.018in"/>
    </style:style>
    <style:style style:name="P362" style:parent-style-name="Textbody" style:family="paragraph">
      <style:paragraph-properties fo:margin-bottom="0.018in"/>
    </style:style>
    <style:style style:name="P363" style:parent-style-name="Textbody" style:family="paragraph">
      <style:paragraph-properties fo:margin-bottom="0.018in"/>
    </style:style>
    <style:style style:name="P364" style:parent-style-name="Textbody" style:family="paragraph">
      <style:paragraph-properties fo:margin-bottom="0.018in"/>
    </style:style>
    <style:style style:name="P365" style:parent-style-name="Textbody" style:family="paragraph">
      <style:paragraph-properties fo:margin-bottom="0.018in"/>
    </style:style>
    <style:style style:name="P366" style:parent-style-name="Textbody" style:family="paragraph">
      <style:paragraph-properties fo:margin-bottom="0.018in"/>
    </style:style>
    <style:style style:name="P367" style:parent-style-name="Textbody" style:family="paragraph">
      <style:paragraph-properties fo:margin-bottom="0.018in"/>
    </style:style>
    <style:style style:name="P368" style:parent-style-name="Textbody" style:list-style-name="LFO7" style:family="paragraph">
      <style:paragraph-properties fo:margin-bottom="0.018in"/>
    </style:style>
    <style:style style:name="P369" style:parent-style-name="Textbody" style:list-style-name="LFO7" style:family="paragraph">
      <style:paragraph-properties fo:margin-bottom="0.018in"/>
    </style:style>
    <style:style style:name="P370" style:parent-style-name="Textbody" style:list-style-name="LFO7" style:family="paragraph">
      <style:paragraph-properties fo:margin-bottom="0.018in"/>
    </style:style>
    <style:style style:name="P371" style:parent-style-name="Textbody" style:list-style-name="LFO7" style:family="paragraph">
      <style:paragraph-properties fo:margin-bottom="0.018in"/>
    </style:style>
    <style:style style:name="P372" style:parent-style-name="Textbody" style:list-style-name="LFO7" style:family="paragraph">
      <style:paragraph-properties fo:margin-bottom="0.018in"/>
    </style:style>
    <style:style style:name="P373" style:parent-style-name="Textbody" style:list-style-name="LFO7" style:family="paragraph">
      <style:paragraph-properties fo:margin-bottom="0.018in"/>
    </style:style>
    <style:style style:name="P374" style:parent-style-name="Textbody" style:list-style-name="LFO7" style:family="paragraph">
      <style:paragraph-properties fo:margin-bottom="0.018in"/>
    </style:style>
    <style:style style:name="P375" style:parent-style-name="Textbody" style:family="paragraph">
      <style:paragraph-properties fo:margin-bottom="0.018in"/>
    </style:style>
    <style:style style:name="P376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7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7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7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80" style:parent-style-name="ParágrafodaLista" style:family="paragraph">
      <style:paragraph-properties fo:margin-bottom="0in"/>
    </style:style>
    <style:style style:name="T38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38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background-color="#FFFF00"/>
    </style:style>
    <style:style style:name="T38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38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background-color="#FFFF00"/>
    </style:style>
    <style:style style:name="T38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86" style:parent-style-name="Textbody" style:family="paragraph">
      <style:paragraph-properties fo:margin-bottom="0.018in"/>
    </style:style>
    <style:style style:name="P387" style:parent-style-name="Textbody" style:family="paragraph">
      <style:paragraph-properties fo:margin-bottom="0.018in"/>
    </style:style>
    <style:style style:name="P388" style:parent-style-name="Textbody" style:family="paragraph">
      <style:paragraph-properties fo:margin-bottom="0.018in"/>
    </style:style>
    <style:style style:name="P389" style:parent-style-name="Textbody" style:family="paragraph">
      <style:paragraph-properties fo:margin-bottom="0.018in"/>
    </style:style>
    <style:style style:name="P390" style:parent-style-name="Textbody" style:family="paragraph">
      <style:paragraph-properties fo:margin-bottom="0.018in"/>
    </style:style>
    <style:style style:name="P391" style:parent-style-name="Textbody" style:family="paragraph">
      <style:paragraph-properties fo:margin-bottom="0.018in"/>
    </style:style>
    <style:style style:name="P392" style:parent-style-name="Textbody" style:family="paragraph">
      <style:paragraph-properties fo:margin-bottom="0.018in"/>
    </style:style>
    <style:style style:name="P393" style:parent-style-name="Textbody" style:family="paragraph">
      <style:paragraph-properties fo:margin-bottom="0.018in"/>
    </style:style>
    <style:style style:name="P394" style:parent-style-name="Textbody" style:family="paragraph">
      <style:paragraph-properties fo:margin-bottom="0.018in"/>
    </style:style>
    <style:style style:name="P395" style:parent-style-name="Textbody" style:family="paragraph">
      <style:paragraph-properties fo:margin-bottom="0.018in"/>
    </style:style>
    <style:style style:name="P396" style:parent-style-name="Textbody" style:family="paragraph">
      <style:paragraph-properties fo:margin-bottom="0.018in"/>
    </style:style>
    <style:style style:name="P397" style:parent-style-name="Textbody" style:family="paragraph">
      <style:paragraph-properties fo:margin-bottom="0.018in"/>
    </style:style>
    <style:style style:name="P398" style:parent-style-name="Textbody" style:family="paragraph">
      <style:paragraph-properties fo:margin-bottom="0.018in"/>
    </style:style>
    <style:style style:name="P399" style:parent-style-name="Textbody" style:family="paragraph">
      <style:paragraph-properties fo:margin-bottom="0.018in"/>
    </style:style>
    <style:style style:name="P400" style:parent-style-name="Textbody" style:family="paragraph">
      <style:paragraph-properties fo:margin-bottom="0.018in"/>
    </style:style>
    <style:style style:name="P401" style:parent-style-name="Textbody" style:family="paragraph">
      <style:paragraph-properties fo:margin-bottom="0.018in"/>
    </style:style>
    <style:style style:name="P402" style:parent-style-name="Textbody" style:family="paragraph">
      <style:paragraph-properties fo:margin-bottom="0.018in"/>
    </style:style>
    <style:style style:name="P403" style:parent-style-name="Textbody" style:family="paragraph">
      <style:paragraph-properties fo:margin-bottom="0.018in"/>
    </style:style>
    <style:style style:name="P404" style:parent-style-name="Textbody" style:family="paragraph">
      <style:paragraph-properties fo:margin-bottom="0.018in"/>
    </style:style>
    <style:style style:name="P405" style:parent-style-name="Textbody" style:family="paragraph">
      <style:paragraph-properties fo:margin-bottom="0.018in"/>
    </style:style>
    <style:style style:name="P406" style:parent-style-name="Textbody" style:family="paragraph">
      <style:paragraph-properties fo:margin-bottom="0.018in"/>
    </style:style>
    <style:style style:name="P407" style:parent-style-name="Textbody" style:family="paragraph">
      <style:paragraph-properties fo:margin-bottom="0.018in"/>
    </style:style>
    <style:style style:name="P408" style:parent-style-name="Textbody" style:family="paragraph">
      <style:paragraph-properties fo:margin-bottom="0.018in"/>
    </style:style>
    <style:style style:name="P409" style:parent-style-name="Textbody" style:family="paragraph">
      <style:paragraph-properties fo:margin-bottom="0.018in"/>
    </style:style>
    <style:style style:name="P410" style:parent-style-name="Textbody" style:family="paragraph">
      <style:paragraph-properties fo:margin-bottom="0.018in"/>
    </style:style>
    <style:style style:name="P411" style:parent-style-name="Textbody" style:family="paragraph">
      <style:paragraph-properties fo:margin-bottom="0.018in"/>
      <style:text-properties fo:font-weight="bold" style:font-weight-asian="bold" style:font-weight-complex="bold"/>
    </style:style>
    <style:style style:name="P412" style:parent-style-name="Textbody" style:list-style-name="LFO8" style:family="paragraph">
      <style:paragraph-properties fo:margin-bottom="0.018in"/>
    </style:style>
    <style:style style:name="T413" style:parent-style-name="Fonteparág.padrão" style:family="text">
      <style:text-properties fo:font-weight="bold" style:font-weight-asian="bold" style:font-weight-complex="bold"/>
    </style:style>
    <style:style style:name="P414" style:parent-style-name="Textbody" style:list-style-name="LFO8" style:family="paragraph">
      <style:paragraph-properties fo:margin-bottom="0.018in"/>
    </style:style>
    <style:style style:name="T415" style:parent-style-name="Fonteparág.padrão" style:family="text">
      <style:text-properties fo:font-weight="bold" style:font-weight-asian="bold" style:font-weight-complex="bold"/>
    </style:style>
    <style:style style:name="P416" style:parent-style-name="Textbody" style:list-style-name="LFO8" style:family="paragraph">
      <style:paragraph-properties fo:margin-bottom="0.018in"/>
    </style:style>
    <style:style style:name="P417" style:parent-style-name="Textbody" style:family="paragraph">
      <style:paragraph-properties fo:margin-bottom="0.018in"/>
      <style:text-properties fo:font-weight="bold" style:font-weight-asian="bold" style:font-weight-complex="bold"/>
    </style:style>
    <style:style style:name="P418" style:parent-style-name="Textbody" style:list-style-name="LFO9" style:family="paragraph">
      <style:paragraph-properties fo:margin-bottom="0.018in"/>
    </style:style>
    <style:style style:name="T419" style:parent-style-name="Fonteparág.padrão" style:family="text">
      <style:text-properties fo:font-weight="bold" style:font-weight-asian="bold" style:font-weight-complex="bold"/>
    </style:style>
    <style:style style:name="P420" style:parent-style-name="Textbody" style:family="paragraph">
      <style:paragraph-properties fo:margin-bottom="0.018in"/>
      <style:text-properties fo:font-weight="bold" style:font-weight-asian="bold" style:font-weight-complex="bold"/>
    </style:style>
    <style:style style:name="P421" style:parent-style-name="Textbody" style:list-style-name="LFO10" style:family="paragraph">
      <style:paragraph-properties fo:margin-bottom="0.018in"/>
    </style:style>
    <style:style style:name="P422" style:parent-style-name="Textbody" style:list-style-name="LFO10" style:family="paragraph">
      <style:paragraph-properties fo:margin-bottom="0.018in"/>
    </style:style>
    <style:style style:name="P423" style:parent-style-name="Textbody" style:list-style-name="LFO10" style:family="paragraph">
      <style:paragraph-properties fo:margin-bottom="0.018in"/>
    </style:style>
    <style:style style:name="P424" style:parent-style-name="Textbody" style:family="paragraph">
      <style:paragraph-properties fo:margin-bottom="0.018in" fo:margin-left="0.5in">
        <style:tab-stops/>
      </style:paragraph-properties>
    </style:style>
    <style:style style:name="P425" style:parent-style-name="Textbody" style:family="paragraph">
      <style:paragraph-properties fo:margin-bottom="0.018in" fo:margin-left="0.5in">
        <style:tab-stops/>
      </style:paragraph-properties>
    </style:style>
    <style:style style:name="P426" style:parent-style-name="Textbody" style:list-style-name="LFO10" style:family="paragraph">
      <style:paragraph-properties fo:margin-bottom="0.018in"/>
    </style:style>
    <style:style style:name="P427" style:parent-style-name="Textbody" style:list-style-name="LFO10" style:family="paragraph">
      <style:paragraph-properties fo:margin-bottom="0.018in"/>
    </style:style>
    <style:style style:name="P428" style:parent-style-name="Textbody" style:list-style-name="LFO10" style:family="paragraph">
      <style:paragraph-properties fo:margin-bottom="0.018in"/>
    </style:style>
    <style:style style:name="P429" style:parent-style-name="Textbody" style:list-style-name="LFO10" style:family="paragraph">
      <style:paragraph-properties fo:margin-bottom="0.018in"/>
    </style:style>
    <style:style style:name="P430" style:parent-style-name="Textbody" style:list-style-name="LFO10" style:family="paragraph">
      <style:paragraph-properties fo:margin-bottom="0.018in"/>
    </style:style>
    <style:style style:name="P431" style:parent-style-name="Textbody" style:list-style-name="LFO10" style:family="paragraph">
      <style:paragraph-properties fo:margin-bottom="0.018in"/>
    </style:style>
    <style:style style:name="P432" style:parent-style-name="Textbody" style:list-style-name="LFO10" style:family="paragraph">
      <style:paragraph-properties fo:margin-bottom="0.018in"/>
      <style:text-properties fo:background-color="#FFFF00"/>
    </style:style>
    <style:style style:name="P433" style:parent-style-name="Textbody" style:list-style-name="LFO10" style:family="paragraph">
      <style:paragraph-properties fo:margin-bottom="0.018in"/>
    </style:style>
    <style:style style:name="P434" style:parent-style-name="Textbody" style:list-style-name="LFO10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35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36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3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3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3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1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2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3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4" style:parent-style-name="Textbody" style:family="paragraph">
      <style:paragraph-properties fo:margin-bottom="0.018in"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5" style:parent-style-name="Textbody" style:family="paragraph">
      <style:paragraph-properties fo:margin-bottom="0.018in" fo:margin-left="0.5in">
        <style:tab-stops/>
      </style:paragraph-properties>
    </style:style>
    <style:style style:name="P446" style:parent-style-name="Textbody" style:family="paragraph">
      <style:paragraph-properties fo:margin-bottom="0.018in" fo:margin-left="0.5in">
        <style:tab-stops/>
      </style:paragraph-properties>
    </style:style>
    <style:style style:name="P447" style:parent-style-name="Textbody" style:list-style-name="LFO7" style:family="paragraph">
      <style:paragraph-properties fo:margin-bottom="0.018in"/>
    </style:style>
    <style:style style:name="P448" style:parent-style-name="Textbody" style:list-style-name="LFO7" style:family="paragraph">
      <style:paragraph-properties fo:margin-bottom="0.018in"/>
    </style:style>
    <style:style style:name="P449" style:parent-style-name="Textbody" style:list-style-name="LFO7" style:family="paragraph">
      <style:paragraph-properties fo:margin-bottom="0.018in"/>
    </style:style>
    <style:style style:name="P450" style:parent-style-name="Textbody" style:list-style-name="LFO7" style:family="paragraph">
      <style:paragraph-properties fo:margin-bottom="0.018in"/>
    </style:style>
    <style:style style:name="P451" style:parent-style-name="Textbody" style:list-style-name="LFO7" style:family="paragraph">
      <style:paragraph-properties fo:margin-bottom="0.018in"/>
    </style:style>
    <style:style style:name="T45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453" style:parent-style-name="Textbody" style:list-style-name="LFO7" style:family="paragraph">
      <style:paragraph-properties fo:margin-bottom="0.018in"/>
    </style:style>
    <style:style style:name="P454" style:parent-style-name="Textbody" style:family="paragraph">
      <style:paragraph-properties fo:margin-bottom="0.018in"/>
    </style:style>
    <style:style style:name="P455" style:parent-style-name="Textbody" style:family="paragraph">
      <style:paragraph-properties fo:margin-bottom="0.018in"/>
    </style:style>
    <style:style style:name="P456" style:parent-style-name="Textbody" style:family="paragraph">
      <style:paragraph-properties fo:margin-bottom="0.018in"/>
    </style:style>
    <style:style style:name="P457" style:parent-style-name="Textbody" style:family="paragraph">
      <style:paragraph-properties fo:margin-bottom="0.018in"/>
    </style:style>
    <style:style style:name="P458" style:parent-style-name="Textbody" style:family="paragraph">
      <style:paragraph-properties fo:margin-bottom="0.018in"/>
    </style:style>
    <style:style style:name="P459" style:parent-style-name="Textbody" style:family="paragraph">
      <style:paragraph-properties fo:margin-bottom="0.018in"/>
    </style:style>
    <style:style style:name="P460" style:parent-style-name="Textbody" style:family="paragraph">
      <style:paragraph-properties fo:margin-bottom="0.018in"/>
    </style:style>
    <style:style style:name="P461" style:parent-style-name="Textbody" style:family="paragraph">
      <style:paragraph-properties fo:margin-bottom="0.018in"/>
    </style:style>
    <style:style style:name="P462" style:parent-style-name="Textbody" style:family="paragraph">
      <style:paragraph-properties fo:margin-bottom="0.018in"/>
    </style:style>
    <style:style style:name="P463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4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5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6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7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71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72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73" style:parent-style-name="ParágrafodaLista" style:family="paragraph">
      <style:paragraph-properties fo:margin-bottom="0in"/>
    </style:style>
    <style:style style:name="T47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75" style:parent-style-name="ParágrafodaLista" style:family="paragraph">
      <style:paragraph-properties fo:margin-bottom="0in"/>
    </style:style>
    <style:style style:name="P476" style:parent-style-name="ParágrafodaLista" style:family="paragraph">
      <style:paragraph-properties fo:margin-bottom="0in"/>
    </style:style>
    <style:style style:name="P477" style:parent-style-name="ParágrafodaLista" style:family="paragraph">
      <style:paragraph-properties fo:margin-bottom="0in"/>
    </style:style>
    <style:style style:name="P478" style:parent-style-name="Textbody" style:family="paragraph">
      <style:paragraph-properties fo:margin-bottom="0.018in"/>
    </style:style>
    <style:style style:name="P479" style:parent-style-name="Textbody" style:family="paragraph">
      <style:paragraph-properties fo:margin-bottom="0.018in"/>
    </style:style>
    <style:style style:name="P480" style:parent-style-name="Textbody" style:family="paragraph">
      <style:paragraph-properties fo:margin-bottom="0.018in"/>
    </style:style>
    <style:style style:name="P481" style:parent-style-name="Textbody" style:family="paragraph">
      <style:paragraph-properties fo:margin-bottom="0.018in"/>
    </style:style>
    <style:style style:name="P482" style:parent-style-name="Textbody" style:family="paragraph">
      <style:paragraph-properties fo:margin-bottom="0.018in"/>
    </style:style>
    <style:style style:name="P483" style:parent-style-name="Textbody" style:family="paragraph">
      <style:paragraph-properties fo:margin-bottom="0.018in"/>
    </style:style>
    <style:style style:name="P484" style:parent-style-name="Textbody" style:family="paragraph">
      <style:paragraph-properties fo:margin-bottom="0.018in"/>
    </style:style>
    <style:style style:name="P485" style:parent-style-name="Textbody" style:family="paragraph">
      <style:paragraph-properties fo:margin-bottom="0.018in"/>
    </style:style>
    <style:style style:name="P486" style:parent-style-name="Textbody" style:family="paragraph">
      <style:paragraph-properties fo:margin-bottom="0.018in"/>
    </style:style>
    <style:style style:name="P487" style:parent-style-name="Textbody" style:family="paragraph">
      <style:paragraph-properties fo:margin-bottom="0.018in"/>
    </style:style>
    <style:style style:name="P488" style:parent-style-name="Textbody" style:list-style-name="LFO7" style:family="paragraph">
      <style:paragraph-properties fo:margin-bottom="0.018in"/>
    </style:style>
    <style:style style:name="P489" style:parent-style-name="Textbody" style:list-style-name="LFO7" style:family="paragraph">
      <style:paragraph-properties fo:margin-bottom="0.018in"/>
    </style:style>
    <style:style style:name="P490" style:parent-style-name="Textbody" style:list-style-name="LFO7" style:family="paragraph">
      <style:paragraph-properties fo:margin-bottom="0.018in"/>
    </style:style>
    <style:style style:name="P491" style:parent-style-name="Textbody" style:list-style-name="LFO7" style:family="paragraph">
      <style:paragraph-properties fo:margin-bottom="0.018in"/>
    </style:style>
    <style:style style:name="P492" style:parent-style-name="Textbody" style:list-style-name="LFO7" style:family="paragraph">
      <style:paragraph-properties fo:margin-bottom="0.018in"/>
    </style:style>
    <style:style style:name="P493" style:parent-style-name="Textbody" style:list-style-name="LFO7" style:family="paragraph">
      <style:paragraph-properties fo:margin-bottom="0.018in"/>
    </style:style>
    <style:style style:name="P494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95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96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9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98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9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0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2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3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4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0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0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2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3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4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516" style:parent-style-name="Normal" style:family="paragraph">
      <style:text-properties fo:font-weight="bold" style:font-weight-asian="bold" style:font-weight-complex="bold"/>
    </style:style>
    <style:style style:name="P517" style:parent-style-name="Normal" style:family="paragraph">
      <style:paragraph-properties fo:margin-bottom="0in"/>
    </style:style>
    <style:style style:name="P518" style:parent-style-name="Normal" style:family="paragraph">
      <style:paragraph-properties fo:margin-bottom="0in"/>
    </style:style>
    <style:style style:name="P519" style:parent-style-name="Normal" style:family="paragraph">
      <style:paragraph-properties fo:margin-bottom="0in"/>
    </style:style>
    <style:style style:name="P520" style:parent-style-name="Normal" style:family="paragraph">
      <style:paragraph-properties fo:margin-bottom="0in"/>
    </style:style>
    <style:style style:name="P521" style:parent-style-name="Normal" style:family="paragraph">
      <style:paragraph-properties fo:margin-bottom="0in"/>
    </style:style>
    <style:style style:name="P522" style:parent-style-name="Normal" style:family="paragraph">
      <style:paragraph-properties fo:margin-bottom="0in"/>
    </style:style>
    <style:style style:name="P523" style:parent-style-name="Normal" style:family="paragraph">
      <style:paragraph-properties fo:margin-bottom="0in"/>
    </style:style>
    <style:style style:name="P524" style:parent-style-name="Normal" style:family="paragraph">
      <style:paragraph-properties fo:margin-bottom="0in"/>
    </style:style>
    <style:style style:name="P525" style:parent-style-name="Normal" style:family="paragraph">
      <style:paragraph-properties fo:margin-bottom="0in"/>
    </style:style>
    <style:style style:name="P526" style:parent-style-name="Normal" style:family="paragraph">
      <style:paragraph-properties fo:margin-bottom="0in"/>
    </style:style>
    <style:style style:name="P5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528" style:parent-style-name="ParágrafodaLista" style:list-style-name="LFO5" style:family="paragraph">
      <style:paragraph-properties style:vertical-align="auto" fo:margin-bottom="0in" fo:line-height="107%"/>
      <style:text-properties fo:font-weight="bold" style:font-weight-asian="bold" style:font-weight-complex="bold" fo:hyphenate="true"/>
    </style:style>
    <style:style style:name="P529" style:parent-style-name="Normal" style:family="paragraph">
      <style:paragraph-properties fo:margin-bottom="0in"/>
    </style:style>
    <style:style style:name="T530" style:parent-style-name="Fonteparág.padrão" style:family="text">
      <style:text-properties fo:font-weight="bold" style:font-weight-asian="bold" style:font-weight-complex="bold"/>
    </style:style>
    <style:style style:name="P531" style:parent-style-name="Normal" style:family="paragraph">
      <style:paragraph-properties fo:margin-bottom="0in"/>
    </style:style>
    <style:style style:name="P532" style:parent-style-name="ParágrafodaLista" style:list-style-name="LFO5" style:family="paragraph">
      <style:paragraph-properties style:vertical-align="auto" fo:margin-bottom="0in" fo:line-height="107%"/>
      <style:text-properties fo:font-weight="bold" style:font-weight-asian="bold" style:font-weight-complex="bold" fo:hyphenate="true"/>
    </style:style>
    <style:style style:name="P533" style:parent-style-name="Normal" style:family="paragraph">
      <style:paragraph-properties fo:margin-bottom="0in"/>
    </style:style>
    <style:style style:name="P534" style:parent-style-name="Normal" style:family="paragraph">
      <style:paragraph-properties fo:margin-bottom="0in"/>
    </style:style>
    <style:style style:name="P535" style:parent-style-name="ParágrafodaLista" style:list-style-name="LFO5" style:family="paragraph">
      <style:paragraph-properties style:vertical-align="auto" fo:margin-bottom="0in" fo:line-height="107%"/>
      <style:text-properties fo:font-weight="bold" style:font-weight-asian="bold" style:font-weight-complex="bold" fo:hyphenate="true"/>
    </style:style>
    <style:style style:name="P536" style:parent-style-name="Normal" style:family="paragraph">
      <style:paragraph-properties fo:margin-bottom="0in"/>
    </style:style>
    <style:style style:name="P537" style:parent-style-name="Normal" style:family="paragraph">
      <style:paragraph-properties fo:margin-bottom="0in"/>
    </style:style>
    <style:style style:name="P538" style:parent-style-name="Normal" style:family="paragraph">
      <style:paragraph-properties fo:margin-bottom="0in"/>
    </style:style>
    <style:style style:name="P539" style:parent-style-name="Normal" style:family="paragraph">
      <style:paragraph-properties fo:margin-bottom="0in"/>
    </style:style>
    <style:style style:name="T540" style:parent-style-name="Fonteparág.padrão" style:family="text">
      <style:text-properties fo:background-color="#FFFF00"/>
    </style:style>
    <style:style style:name="P541" style:parent-style-name="Normal" style:family="paragraph">
      <style:paragraph-properties fo:margin-bottom="0in"/>
    </style:style>
    <style:style style:name="P542" style:parent-style-name="ParágrafodaLista" style:list-style-name="LFO5" style:family="paragraph">
      <style:paragraph-properties style:vertical-align="auto" fo:margin-bottom="0in" fo:line-height="107%"/>
      <style:text-properties fo:font-weight="bold" style:font-weight-asian="bold" style:font-weight-complex="bold" fo:hyphenate="true"/>
    </style:style>
    <style:style style:name="P543" style:parent-style-name="Normal" style:family="paragraph">
      <style:paragraph-properties fo:margin-bottom="0in"/>
    </style:style>
    <style:style style:name="P544" style:parent-style-name="Normal" style:family="paragraph">
      <style:paragraph-properties fo:margin-bottom="0in"/>
    </style:style>
    <style:style style:name="P545" style:parent-style-name="Normal" style:family="paragraph">
      <style:paragraph-properties fo:margin-bottom="0in"/>
    </style:style>
    <style:style style:name="P546" style:parent-style-name="Normal" style:family="paragraph">
      <style:paragraph-properties fo:margin-bottom="0in"/>
    </style:style>
    <style:style style:name="P547" style:parent-style-name="ParágrafodaLista" style:list-style-name="LFO5" style:family="paragraph">
      <style:paragraph-properties style:vertical-align="auto" fo:margin-bottom="0in" fo:line-height="107%"/>
      <style:text-properties fo:font-weight="bold" style:font-weight-asian="bold" style:font-weight-complex="bold" fo:hyphenate="true"/>
    </style:style>
    <style:style style:name="P548" style:parent-style-name="Normal" style:family="paragraph">
      <style:paragraph-properties fo:margin-bottom="0in"/>
    </style:style>
    <style:style style:name="P549" style:parent-style-name="Normal" style:family="paragraph">
      <style:paragraph-properties fo:margin-bottom="0in"/>
    </style:style>
    <style:style style:name="P550" style:parent-style-name="Normal" style:family="paragraph">
      <style:paragraph-properties fo:margin-bottom="0in"/>
    </style:style>
    <style:style style:name="P551" style:parent-style-name="ParágrafodaLista" style:list-style-name="LFO5" style:family="paragraph">
      <style:paragraph-properties style:vertical-align="auto" fo:margin-bottom="0in" fo:line-height="107%"/>
      <style:text-properties fo:font-weight="bold" style:font-weight-asian="bold" style:font-weight-complex="bold" fo:hyphenate="true"/>
    </style:style>
    <style:style style:name="P552" style:parent-style-name="Normal" style:family="paragraph">
      <style:paragraph-properties fo:margin-bottom="0in"/>
    </style:style>
    <style:style style:name="P553" style:parent-style-name="Normal" style:family="paragraph">
      <style:paragraph-properties fo:margin-bottom="0in"/>
    </style:style>
    <style:style style:name="P554" style:parent-style-name="Normal" style:family="paragraph">
      <style:paragraph-properties fo:margin-bottom="0in"/>
    </style:style>
    <style:style style:name="P555" style:parent-style-name="Normal" style:family="paragraph">
      <style:paragraph-properties fo:margin-bottom="0in"/>
    </style:style>
    <style:style style:name="P5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557" style:parent-style-name="Normal" style:family="paragraph">
      <style:paragraph-properties fo:margin-bottom="0in"/>
    </style:style>
    <style:style style:name="P558" style:parent-style-name="Normal" style:family="paragraph">
      <style:paragraph-properties fo:margin-bottom="0in"/>
    </style:style>
    <style:style style:name="P559" style:parent-style-name="Normal" style:family="paragraph">
      <style:paragraph-properties fo:margin-bottom="0in"/>
    </style:style>
    <style:style style:name="P560" style:parent-style-name="Normal" style:family="paragraph">
      <style:paragraph-properties fo:margin-bottom="0in"/>
    </style:style>
    <style:style style:name="P561" style:parent-style-name="Normal" style:family="paragraph">
      <style:paragraph-properties fo:margin-bottom="0in"/>
    </style:style>
    <style:style style:name="P562" style:parent-style-name="Normal" style:family="paragraph">
      <style:paragraph-properties fo:margin-bottom="0in"/>
    </style:style>
    <style:style style:name="P563" style:parent-style-name="Normal" style:family="paragraph">
      <style:paragraph-properties fo:margin-bottom="0in"/>
    </style:style>
    <style:style style:name="P564" style:parent-style-name="Normal" style:family="paragraph">
      <style:paragraph-properties fo:margin-bottom="0in"/>
    </style:style>
    <style:style style:name="P56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ext:p text:style-name="P1">REQUERIMENTO DO ESTABELECIMENTO (DEMAIS ESTABELECIMENTOS)</text:p>
      <text:p text:style-name="P2">Razão social</text:p>
      <text:p text:style-name="P3">Nome fantasia</text:p>
      <text:p text:style-name="P4">Dados de atualização (endereço / telefone / e-mail)</text:p>
      <text:p text:style-name="P5">Alteração de horário de funcionamento informada (se necessário, alterar)</text:p>
      <text:p text:style-name="P6">Emitido pelo atual<text:s/>Diretor Técnico</text:p>
      <text:p text:style-name="P7">Emitido nos últimos 30 dias</text:p>
      <text:p text:style-name="P8">Ramo de atividade, se alterado, solicitar alteração contratual que possua o CNAE da atividade declarada</text:p>
      <text:p text:style-name="P9"/>
      <text:p text:style-name="P10">Para ingresso em laboratório de análise clínicas, ver se o profissional tem formação como farmacêutico bioquímico ou generalista.</text:p>
      <text:p text:style-name="P11">Para naturezas de atividades como estética e vacinação, deverão possuir anotação de habilitação nas respectivas áreas.</text:p>
      <text:p text:style-name="P12"/>
      <text:p text:style-name="P13"/>
      <text:p text:style-name="P14">EM CASOS DE REGISTRO DE ESTABELECIMENTO:<text:s/></text:p>
      <text:p text:style-name="P15"><text:span text:style-name="T16">Deverá ver se houve o pagamento da<text:s/></text:span><text:span text:style-name="T17">taxa de registro.</text:span></text:p>
      <text:p text:style-name="P18">Dados I: <text:s/>campo data de inscrição incluir a data da plenária vigente.</text:p>
      <text:p text:style-name="P19">Dados II: preencher a data da plenária vigente e a data de abertura da firma conforme contrato social.<text:s/></text:p>
      <text:p text:style-name="P20"/>
      <text:p text:style-name="P21"><text:span text:style-name="T22">(Em caso de<text:s/></text:span><text:span text:style-name="T23">reabilitação</text:span><text:span text:style-name="T24"><text:s/></text:span><text:span text:style-name="T25">de registro</text:span><text:span text:style-name="T26"><text:s/>preencher o campo<text:s/></text:span><text:span text:style-name="T27">Data de Reabilitação</text:span><text:span text:style-name="T28"><text:s/>com a data da<text:s/></text:span><text:span text:style-name="T29">plenária)</text:span></text:p>
      <text:p text:style-name="P30">Incluir: Status 105 - com data da plenária vigente.</text:p>
      <text:p text:style-name="P31"><text:span text:style-name="T32">Caso seja<text:s/></text:span><text:span text:style-name="T33">reabilitação de registro,<text:s/></text:span><text:span text:style-name="T34">incluir: Status 106 - com a data da plenária vigente.</text:span></text:p>
      <text:p text:style-name="P35"><text:span text:style-name="T36">Mudar a ocorrência nos protocolos para<text:s/></text:span><text:span text:style-name="T37">16 para registro</text:span><text:span text:style-name="T38"><text:s/>e<text:s/></text:span><text:span text:style-name="T39">17 para reabilitação</text:span><text:span text:style-name="T40">.</text:span></text:p>
      <text:p text:style-name="P41"/>
      <text:p text:style-name="P42"><text:span text:style-name="T43">VERIFICAR SE A EMPRESA SE ENQUADRA NOS CRITÉRIO DO<text:s/></text:span><text:span text:style-name="T44">AD REFERENDUM:</text:span></text:p>
      <text:p text:style-name="P45">São João, Nissei, Panvel, Brava, Beautypharma, Unipreço, Fleming, Trajano, Freefarma, Ponto Popular (Farmácia Kalug)</text:p>
      <text:p text:style-name="P46"/>
      <text:p text:style-name="P47"><text:span text:style-name="T48">Verificar se não está na lista das empresas sem<text:s/></text:span><text:span text:style-name="T49">AD REFERENDUM.</text:span></text:p>
      <text:p text:style-name="P50">Verificar se está regular<text:s/>dentro do prazo, até a data do protocolo.<text:s/></text:p>
      <text:p text:style-name="P51">Sem débitos (exceção de RECURSO CFF e/ou MAND. SEGURANÇA)</text:p>
      <text:p text:style-name="P52">Sem autuação nos últimos 30 dias do protocolo.<text:s/></text:p>
      <text:p text:style-name="P53"/>
      <text:p text:style-name="P54">TRAMITAÇÃO DO PROTOCOLO:</text:p>
      <text:p text:style-name="P55">Evoluir: <text:s/>Local da evolução (45) – SITUAÇÃO (1) – JULGAMENTO (27) – USUÁRIO DE ENCAMINHAMENTO (Nº do cadastro do colaborador conferente)</text:p>
      <text:p text:style-name="P56"/>
      <text:p text:style-name="P57"><text:s text:c="12"/></text:p>
      <text:p text:style-name="P58">ANEXAR O ARQUIVO DO PROCEDIMENTO NO GED:</text:p>
      <text:p text:style-name="P59">Juntar documentos no atalho PDF24:</text:p>
      <text:list text:style-name="LFO1" text:continue-numbering="true">
        <text:list-item>
          <text:p text:style-name="P60">Termo de Responsabilidade Técnica do Estabelecimento.</text:p>
        </text:list-item>
        <text:list-item>
          <text:p text:style-name="P61"><text:s/>Protocolo em PDF, impressão do protocolo - 1 via.</text:p>
        </text:list-item>
      </text:list>
      <text:p text:style-name="P62"/>
      <text:p text:style-name="P63">Em caso de registro, além dos documentos mencionados, devem ser anexados todos os demais documentos de registro.</text:p>
      <text:p text:style-name="P64"/>
      <text:p text:style-name="P65"/>
      <text:p text:style-name="P66"/>
      <text:p text:style-name="P67"/>
      <text:soft-page-break/>
      <text:p text:style-name="P68"><text:s/></text:p>
      <text:p text:style-name="P69">REQUERIMENTO DO ESTABELECIMENTO MANIPULAÇÃO ALOPATIA</text:p>
      <text:list text:style-name="LFO2" text:continue-numbering="true">
        <text:list-item>
          <text:p text:style-name="P70"><text:s text:c="7"/>Razão social</text:p>
        </text:list-item>
      </text:list>
      <text:p text:style-name="P71">•<text:tab/>Nome fantasia</text:p>
      <text:p text:style-name="P72">•<text:tab/>Dados de atualização (endereço / telefone /<text:s/>e-mail)</text:p>
      <text:p text:style-name="P73">•<text:tab/>Alteração de horário de funcionamento informada (alterar)</text:p>
      <text:p text:style-name="P74">•<text:tab/>Emitido pelo atual DT</text:p>
      <text:p text:style-name="P75">•<text:tab/>Verificar se está assinalado alopatia.</text:p>
      <text:p text:style-name="P76">•<text:tab/>Emitido nos últimos 30 dias</text:p>
      <text:p text:style-name="P77">•<text:tab/>Ramo de atividade confere: Caso alterado, solicitar alteração contratual que possua o CNAE da atividade declarada.</text:p>
      <text:p text:style-name="P78"/>
      <text:p text:style-name="P79">Registro de estabelecimento verificar o pagamento da taxa de registro e realizar sempre os seguintes lançamentos.</text:p>
      <text:p text:style-name="P80">ABA dados I:<text:s/></text:p>
      <text:p text:style-name="P81">No campo data de inscrição: data da plenária vigente.</text:p>
      <text:p text:style-name="P82">ABA dados II:</text:p>
      <text:p text:style-name="P83">Preencher a data da<text:s/>plenária vigente e data de abertura da firma conforme contrato social. (Caso reabilitação preencher o campo especificado com a data da plenária)</text:p>
      <text:p text:style-name="P84">Status 105 com data da plenária vigente.</text:p>
      <text:p text:style-name="P85">Caso seja reabilitação de registro - Status 106 com a data da plenária vigente.</text:p>
      <text:p text:style-name="P86"><text:span text:style-name="T87">Mudar a ocorrência dos protocolos para 16 para registro e 17 para reabilitação</text:span><text:span text:style-name="T88">.</text:span></text:p>
      <text:p text:style-name="P89"/>
      <text:p text:style-name="P90">VERIFICAR SE A EMPRESA SE ENQUADRA NOS CRITÉRIO DO AD -REFERENDUM.</text:p>
      <text:p text:style-name="P91">São João, Nissei, Panvel, Brava, Beautypharma, Unipreço, Fleming, Trajano,<text:s/></text:p>
      <text:p text:style-name="P92">Freefarma, Ponto<text:s/>Popular (Farmácia Kalug)</text:p>
      <text:p text:style-name="P93"/>
      <text:p text:style-name="P94">- Verificar se não está na lista das empresas sem AD.</text:p>
      <text:p text:style-name="P95">- Estava regular ou com prazo até a DATA DO PROTOCOLO.<text:s/></text:p>
      <text:p text:style-name="P96"><text:span text:style-name="T97">verificar se o protocolo foi realizado dentro do período de 30 dias da data fim do status.</text:span></text:p>
      <text:p text:style-name="P98">- Sem débitos (exceção de RECURSO CFF e/ou MAND. SEGURANÇA)</text:p>
      <text:p text:style-name="P99">- Sem autuação nos últimos 30 dias do protocolo.<text:s/></text:p>
      <text:p text:style-name="P100"/>
      <text:p text:style-name="P101">TRAMITAÇÃO DO PROTOCOLO:</text:p>
      <text:p text:style-name="P102">Evoluir: <text:s/>Local da evolução (45) – SITUAÇÃO (1) – JULGAMENTO (27) – USUÁRIO DE ENCAMINHAMENTO (Nº do cadastro do colaborador conferente)</text:p>
      <text:p text:style-name="P103"/>
      <text:p text:style-name="P104"><text:s text:c="14"/>ANEXAR O ARQUIVO DO PROCEDIMENTO NO GED.<text:s/></text:p>
      <text:p text:style-name="P105"><text:s text:c="14"/>Juntar documentos no atalho PDF24:</text:p>
      <text:p text:style-name="P106"><text:s text:c="15"/>- Termo de Responsabilidade Técnica do Estabelecimento.</text:p>
      <text:p text:style-name="P107"><text:s text:c="15"/>- Impressão protocolo – 1 via</text:p>
      <text:p text:style-name="P108"><text:s/></text:p>
      <text:p text:style-name="P109">Para registro, além dos documentos citados acima, juntar os documentos conferidos no protocolo</text:p>
      <text:p text:style-name="P110"/>
      <text:p text:style-name="P111"/>
      <text:p text:style-name="P112"/>
      <text:p text:style-name="P113"/>
      <text:p text:style-name="P114"/>
      <text:p text:style-name="P115"/>
      <text:soft-page-break/>
      <text:p text:style-name="P116">REQUERIMENTO DO ESTABELECIMENTO MANIPULAÇÃO ALOPATIA / HOMEOPATIA</text:p>
      <text:list text:style-name="LFO2" text:continue-numbering="true">
        <text:list-item>
          <text:p text:style-name="P117"><text:s text:c="7"/>Razão social</text:p>
        </text:list-item>
      </text:list>
      <text:p text:style-name="P118">•<text:tab/>Nome fantasia</text:p>
      <text:p text:style-name="P119">•<text:tab/>Dados de atualização (endereço / telefone / e-mail)</text:p>
      <text:p text:style-name="P120">•<text:tab/>Alteração de horário de<text:s/>funcionamento informada (alterar)</text:p>
      <text:p text:style-name="P121">• <text:s text:c="4"/>Emitido pelo atual DT</text:p>
      <text:p text:style-name="P122"><text:span text:style-name="T123">• <text:s text:c="4"/>Verificar se está assinalado alopatia<text:s/></text:span><text:span text:style-name="T124">e homeopatia</text:span></text:p>
      <text:p text:style-name="P125">• <text:s text:c="4"/>Emitido nos últimos 30 dias</text:p>
      <text:list text:style-name="LFO3" text:continue-numbering="true">
        <text:list-item>
          <text:p text:style-name="P126"><text:span text:style-name="T127">Homeopatia: DT habilitado Homeopatia:<text:s/></text:span><text:span text:style-name="T128">e substituto/dap</text:span></text:p>
        </text:list-item>
        <text:list-item>
          <text:p text:style-name="P129">demais profissionais habilitados</text:p>
        </text:list-item>
      </text:list>
      <text:p text:style-name="P130"><text:tab/>Ramo de atividade confere: Caso alterado, solicita alteração contratual que possua o CNAE da atividade declarada</text:p>
      <text:p text:style-name="P131">Registro de estabelecimento verificar o pagamento da taxa de registro e realizar sempre os seguintes lançamentos.</text:p>
      <text:p text:style-name="P132">- ABA dados I:<text:s/></text:p>
      <text:p text:style-name="P133">No campo data de inscrição: data da plenária vigente.</text:p>
      <text:p text:style-name="P134">ABA dados II:</text:p>
      <text:p text:style-name="P135">Preencher a data da plenária vigente e data de abertura da firma conforme contrato social. (Caso reabilitação preencher o campo especificado com a data da plenária)</text:p>
      <text:p text:style-name="P136">Status 105 com data da plenária vigente.</text:p>
      <text:p text:style-name="P137">Caso seja reabilitação de registro - Status 106 com a data da plenária vigente.</text:p>
      <text:p text:style-name="P138"><text:span text:style-name="T139">Mudar a ocorrência dos protocolos para 16 para registro e 17 para reabilitação</text:span><text:span text:style-name="T140">.</text:span></text:p>
      <text:p text:style-name="P141"/>
      <text:p text:style-name="P142">VERIFICAR SE A EMPRESA SE ENQUADRA NOS CRITÉRIO DO AD -REFERENDUM.</text:p>
      <text:p text:style-name="P143">São João, Nissei, Panvel, Brava, Beautypharma, Unipreço, Fleming, Trajano,<text:s/></text:p>
      <text:p text:style-name="P144">Freefarma, Ponto Popular (Farmácia Kalug)</text:p>
      <text:p text:style-name="P145"/>
      <text:p text:style-name="P146">- Verificar se não está na lista das empresas sem AD.</text:p>
      <text:p text:style-name="P147"><text:span text:style-name="T148">- Estava regular ou com prazo até a DATA DO PROTOCOLO.<text:s/></text:span><text:span text:style-name="T149">verificar se o protocolo foi realizado dentro do período de 30 dias da data fim do status.</text:span></text:p>
      <text:p text:style-name="P150"/>
      <text:p text:style-name="P151">- Sem débitos (exceção de RECURSO CFF e/ou MAND. SEGURANÇA)</text:p>
      <text:p text:style-name="P152">- Sem autuação nos últimos 30 dias do protocolo.<text:s/></text:p>
      <text:p text:style-name="P153"/>
      <text:p text:style-name="P154"/>
      <text:p text:style-name="P155">TRAMITAÇÃO DO PROTOCOLO:</text:p>
      <text:p text:style-name="P156">Evoluir: <text:s/>Local da evolução (45) – SITUAÇÃO (1) – JULGAMENTO (27) – USUÁRIO DE<text:s/>ENCAMINHAMENTO (Nº do cadastro do colaborador conferente)</text:p>
      <text:p text:style-name="P157"/>
      <text:p text:style-name="P158"><text:s text:c="14"/>ANEXAR O ARQUIVO DO PROCEDIMENTO NO GED.<text:s/></text:p>
      <text:p text:style-name="P159"><text:s text:c="14"/>Juntar documentos no atalho PDF24:</text:p>
      <text:p text:style-name="P160"><text:s text:c="15"/>- Termo de Responsabilidade Técnica do Estabelecimento.</text:p>
      <text:p text:style-name="P161"><text:s text:c="15"/>- Impressão protocolo – 1 via</text:p>
      <text:p text:style-name="P162"><text:s/></text:p>
      <text:p text:style-name="P163">Para registro, além dos documentos citados acima, juntar os documentos conferidos no protocolo</text:p>
      <text:p text:style-name="P164"/>
      <text:p text:style-name="P165"/>
      <text:p text:style-name="P166"/>
      <text:p text:style-name="P167">REQUERIMENTO DO ESTABELECIMENTO (FARMÁCIA HOSPITALAR / EQUIVALENTE)</text:p>
      <text:p text:style-name="P168">•<text:tab/>Razão social</text:p>
      <text:p text:style-name="P169">•<text:tab/>Nome fantasia</text:p>
      <text:p text:style-name="P170">•<text:tab/>Dados de atualização (endereço / telefone / e-mail)</text:p>
      <text:p text:style-name="P171">•<text:tab/>Alteração de horário de funcionamento informada (alterar)</text:p>
      <text:p text:style-name="P172">•<text:tab/>Emitido pelo atual DT</text:p>
      <text:p text:style-name="P173">•<text:tab/>Emitido nos últimos 30 dias</text:p>
      <text:p text:style-name="P174">•<text:tab/><text:tab/>Ramo de atividade confere: Caso alterado, solicita alteração contratual que <text:s text:c="7"/>possua o CNAE da atividade declarada<text:s/></text:p>
      <text:list text:style-name="LFO4" text:continue-numbering="true">
        <text:list-item>
          <text:p text:style-name="P175">Verificar o preenchimento dos campos dos tipos de estabelecimentos hospitalares -Especialidade - Hospital (Geral ou especializado em... ) Número de leitos / Caso possua Oncologia ou Radiofarmácia deverá estar indicado<text:s/>profissional habilitado na área / Formulário emitido pelo atual DT / Emitido nos últimos 30 dias Ramo de atividade confere:<text:s/></text:p>
        </text:list-item>
      </text:list>
      <text:p text:style-name="P176"/>
      <text:list text:style-name="LFO4" text:continue-numbering="true">
        <text:list-item>
          <text:p text:style-name="P177"><text:span text:style-name="T178">Registro de estabelecimento verificar<text:s/></text:span><text:span text:style-name="T179">o pagamento da taxa de registro</text:span><text:span text:style-name="T180"><text:s/>e realizar sempre os seguintes lançamentos.</text:span></text:p>
        </text:list-item>
        <text:list-item>
          <text:p text:style-name="P181">- ABA dados I:<text:s/></text:p>
        </text:list-item>
        <text:list-item>
          <text:p text:style-name="P182">No campo data de inscrição: data da plenária vigente.</text:p>
        </text:list-item>
        <text:list-item>
          <text:p text:style-name="P183">ABA dados II:</text:p>
        </text:list-item>
        <text:list-item>
          <text:p text:style-name="P184">Preencher a data da plenária vigente e data de abertura da firma conforme contrato social. (Caso reabilitação preencher o campo especificado com a data da plenária)</text:p>
        </text:list-item>
        <text:list-item>
          <text:p text:style-name="P185">Status 105 com data da plenária vigente.</text:p>
        </text:list-item>
        <text:list-item>
          <text:p text:style-name="P186">Caso seja reabilitação de registro - Status 106 com a data da plenária vigente.</text:p>
        </text:list-item>
        <text:list-item>
          <text:p text:style-name="P187"><text:span text:style-name="T188">Mudar a ocorrência dos protocolos para 16 para registro e 17 para reabilitação</text:span><text:span text:style-name="T189">.</text:span></text:p>
        </text:list-item>
      </text:list>
      <text:p text:style-name="P190"/>
      <text:p text:style-name="P191">VERIFICAR SE A EMPRESA SE ENQUADRA NOS CRITÉRIO DO AD -REFERENDUM.</text:p>
      <text:p text:style-name="P192">São João, Nissei, Panvel, Brava, Beautypharma, Unipreço, Fleming, Trajano,<text:s/></text:p>
      <text:p text:style-name="P193">Freefarma, Ponto Popular (Farmácia Kalug)</text:p>
      <text:p text:style-name="P194"/>
      <text:p text:style-name="P195">- Verificar se não está na lista das empresas sem AD.</text:p>
      <text:p text:style-name="P196">- Estava regular ou com prazo até a DATA DO PROTOCOLO.<text:s/></text:p>
      <text:p text:style-name="P197">- Sem débitos (exceção de<text:s/>RECURSO CFF e/ou MAND. SEGURANÇA)</text:p>
      <text:p text:style-name="P198">- Sem autuação nos últimos 30 dias do protocolo.<text:s/></text:p>
      <text:p text:style-name="P199"><text:span text:style-name="T200">- Caso seja menos de 50 leitos e esteja com o status 9457, poderá ser solicitado AD.</text:span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REQUERIMENTO DO ESTABELECIMENTO (INDÚSTRIA)</text:p>
      <text:p text:style-name="P217"/>
      <text:p text:style-name="P218">•<text:tab/>Razão social</text:p>
      <text:p text:style-name="P219">•<text:tab/>Nome<text:s/>fantasia</text:p>
      <text:p text:style-name="P220">•<text:tab/>Dados de atualização (endereço / telefone / e-mail)</text:p>
      <text:p text:style-name="P221">•<text:tab/>Alteração de horário de funcionamento informada (alterar)</text:p>
      <text:p text:style-name="P222">•<text:tab/>Emitido pelo atual DT</text:p>
      <text:p text:style-name="P223">•<text:tab/>Emitido nos últimos 30 dias</text:p>
      <text:p text:style-name="P224">•<text:tab/>Ramo de atividade confere: Caso alterado, solicita alteração contratual que possua o CNAE da atividade declarada</text:p>
      <text:p text:style-name="P225"/>
      <text:p text:style-name="P226">Verificar se o profissional que está ingressando profissional com formação de farmacêutico industrial ou generalista - caso seja indústria homeopática profissional também deverá possui habilitação na área / Haverá campo referente ao horário de produção sob a responsabilidade do(s) responsável(eis) técnico(s)</text:p>
      <text:p text:style-name="P227"/>
      <text:p text:style-name="P228">Registro de estabelecimento verificar o pagamento da taxa de registro e realizar sempre os seguintes lançamentos.</text:p>
      <text:p text:style-name="P229">- ABA dados I:<text:s/></text:p>
      <text:p text:style-name="P230">No campo data de inscrição: data da plenária vigente.</text:p>
      <text:p text:style-name="P231">ABA dados II:</text:p>
      <text:p text:style-name="P232">Preencher a data da plenária vigente e data de abertura da firma conforme contrato social. (Caso reabilitação preencher o campo especificado com a data da plenária)</text:p>
      <text:p text:style-name="P233">Status 105 com data da plenária vigente.</text:p>
      <text:p text:style-name="P234">Caso seja<text:s/>reabilitação de registro - Status 106 com a data da plenária vigente.</text:p>
      <text:p text:style-name="P235"><text:span text:style-name="T236">Mudar a ocorrência dos protocolos para 16 para registro e 17 para reabilitação</text:span><text:span text:style-name="T237">.</text:span></text:p>
      <text:p text:style-name="P238"/>
      <text:p text:style-name="P239">VERIFICAR SE A EMPRESA SE ENQUADRA NOS CRITÉRIO DO AD -REFERENDUM.</text:p>
      <text:p text:style-name="P240">São João, Nissei, Panvel, Brava, Beautypharma, Unipreço, Fleming, Trajano,<text:s/></text:p>
      <text:p text:style-name="P241">Freefarma, Ponto Popular (Farmácia Kalug)</text:p>
      <text:p text:style-name="P242"/>
      <text:p text:style-name="P243"><text:span text:style-name="T244">- Verificar se não está na lista das empresas sem AD.<text:s/></text:span><text:span text:style-name="T245">verificar se o protocolo foi realizado dentro do período de 30 dias da data fim do status.</text:span></text:p>
      <text:p text:style-name="P246">- Estava regular ou com prazo até a DATA DO PROTOCOLO.<text:s/></text:p>
      <text:p text:style-name="P247">- Sem débitos (exceção de RECURSO CFF e/ou MAND. SEGURANÇA)</text:p>
      <text:p text:style-name="P248">- Sem autuação nos últimos 30 dias do protocolo.<text:s/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soft-page-break/>
      <text:p text:style-name="Normal">2. TERMO DE COMPROMISSO DO PROFISSIONAL<text:s/></text:p>
      <text:list text:style-name="LFO6" text:continue-numbering="true">
        <text:list-item>
          <text:p text:style-name="P260">Nome correto<text:s/></text:p>
        </text:list-item>
        <text:list-item>
          <text:p text:style-name="P261">Nº inscrição correto<text:s/></text:p>
        </text:list-item>
        <text:list-item>
          <text:p text:style-name="P262">Conferir se o<text:s/><text:span text:style-name="T263">CNPJ</text:span><text:s/>informado no Termo é do estabelecimento onde ele irá ingressar.</text:p>
        </text:list-item>
        <text:list-item>
          <text:p text:style-name="P264">Solicitou alteração de endereço ( ) alterar e protocolar com a ocorrência 86 com a observação da alteração do endereço anexando o termo de compromisso.<text:s/></text:p>
        </text:list-item>
        <text:list-item>
          <text:p text:style-name="P265">Modalidade compatível com cadastro.<text:s/></text:p>
        </text:list-item>
      </text:list>
      <text:p text:style-name="P266">- Diretor Técnico<text:line-break/>- Assistente Técnico<text:line-break/>- Substituto<text:line-break/>- DAP</text:p>
      <text:list text:style-name="LFO6" text:continue-numbering="true">
        <text:list-item>
          <text:p text:style-name="P267">Horário de atuação dentro do funcionamento ≤ 10h diárias (Caso exceda, verificar tipo de vínculo.</text:p>
        </text:list-item>
        <text:list-item>
          <text:p text:style-name="P268">Verificar intervalo de acordo com o vínculo</text:p>
        </text:list-item>
        <text:list-item>
          <text:p text:style-name="P269">Verificar se há<text:s/><text:span text:style-name="T270">conflito de horários</text:span><text:s/>entre as atividades</text:p>
        </text:list-item>
        <text:list-item>
          <text:p text:style-name="P271">Possuindo outras atividades NÃO conflitantes, verificar no<text:s/><text:span text:style-name="T272">Google Maps</text:span><text:s/>se há tempo hábil de deslocamento.<text:s/><text:span text:style-name="T273">(deverá ser de no mínimo 15 minutos)</text:span></text:p>
        </text:list-item>
        <text:list-item>
          <text:p text:style-name="P274">Intervalo declarado.</text:p>
        </text:list-item>
        <text:list-item>
          <text:p text:style-name="P275">Outras atividades declaradas – Caso possua, solicitar Declaração de vínculos e acrescentar a informação no cadastro do profissional<text:span text:style-name="T276">. (fazer um protocolo e outros vínculos)</text:span></text:p>
        </text:list-item>
        <text:list-item>
          <text:p text:style-name="P277">Formulário emitido nos últimos 30 dias.</text:p>
        </text:list-item>
        <text:list-item>
          <text:p text:style-name="P278">Para modalidade DAP, poderá estar realizando cobertura no<text:span text:style-name="T279"><text:s/>máximo 06 profissionais</text:span><text:s/>de estabelecimentos distintos que possuam assistência farmacêutica integral.</text:p>
        </text:list-item>
        <text:list-item>
          <text:p text:style-name="P280">Verificação da nitidez Hash e código verificador</text:p>
        </text:list-item>
        <text:list-item>
          <text:p text:style-name="P281">Verificar se o profissional possui<text:s/><text:span text:style-name="T282">inscrição secundária em outro CRF,<text:s/></text:span>caso possua, solicitar declaração de responsabilidades técnicas ativas.</text:p>
        </text:list-item>
      </text:list>
      <text:p text:style-name="P283"/>
      <text:p text:style-name="P284">Para modalidade DAP (Não será necessário declarar horários). Caso profissional possua outro vínculo deverá declarar horários nos dias o quais não conflitarão.</text:p>
      <text:p text:style-name="P285"/>
      <text:p text:style-name="P286">Para substituto não poderá declarar horários.</text:p>
      <text:p text:style-name="P287"/>
      <text:p text:style-name="P288">Para profissionais em laboratórios e posto de coleta não será necessário declarar horário, caso possua outra atividade que conflite com o horário de funcionamento do estabelecimento poderá declarar o seu horário de assistência.</text:p>
      <text:p text:style-name="P289"/>
      <text:soft-page-break/>
      <text:list text:style-name="LFO7" text:continue-numbering="true">
        <text:list-item>
          <text:p text:style-name="P290"><text:span text:style-name="StrongEmphasis">CTPS FÍSICA</text:span><text:s/></text:p>
        </text:list-item>
      </text:list>
      <text:p text:style-name="P291"/>
      <text:list text:style-name="LFO7" text:continue-numbering="true">
        <text:list-item>
          <text:p text:style-name="P292">Página da foto com assinatura<text:s/></text:p>
        </text:list-item>
        <text:list-item>
          <text:p text:style-name="P293">Qualificação civil<text:s/></text:p>
        </text:list-item>
        <text:list-item>
          <text:p text:style-name="P294">Contrato de trabalho<text:s/><text:line-break/>- Razão social / CNPJ</text:p>
        </text:list-item>
      </text:list>
      <text:p text:style-name="P295">- Assinaturas do contratante.</text:p>
      <text:p text:style-name="P296"><text:s text:c="6"/>- Remuneração conforme piso homologado pelo sindicato da região – Caso esteja <text:s text:c="5"/>abaixo do piso, apresentar a página da de alteração salarial.</text:p>
      <text:list text:style-name="LFO7" text:continue-numbering="true">
        <text:list-item>
          <text:p text:style-name="P297">Cargo: Farmacêutico – Caso apresentado cargo diferente, deverá estar informado na página de anotações gerais, informando a atualização de cargo para FARMACÊUTICO - CBO 2234-05</text:p>
        </text:list-item>
        <text:list-item>
          <text:p text:style-name="P298">Assinatura representante legal</text:p>
        </text:list-item>
        <text:list-item>
          <text:p text:style-name="P299">Caso profissional for atuar na filial por meio de primeiro ingresso ou transferência, deverá estar descrito na página das anotações gerais com data de início e assinatura do representante.</text:p>
        </text:list-item>
      </text:list>
      <text:p text:style-name="P300"/>
      <text:p text:style-name="P301">Observações de lançamentos no Sagicon:</text:p>
      <text:p text:style-name="P302">Inativar status 210</text:p>
      <text:p text:style-name="P303">Status 108 ingresso.</text:p>
      <text:p text:style-name="P304">Caso seja registro: 105 registro e 9452 recadastramento.</text:p>
      <text:p text:style-name="P305"><text:s/>Caso seja reabilitação de registro: status 106</text:p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>CTPS DIGITAL</text:p>
      <text:list text:style-name="LFO7" text:continue-numbering="true">
        <text:list-item>
          <text:p text:style-name="P334">Dados do profissional<text:s/></text:p>
        </text:list-item>
        <text:list-item>
          <text:p text:style-name="P335">função correta e CBO <text:s/></text:p>
        </text:list-item>
        <text:list-item>
          <text:p text:style-name="P336">CNPJ local de trabalho<text:s/></text:p>
        </text:list-item>
        <text:list-item>
          <text:p text:style-name="P337">Remuneração de acordo com o piso homologado pelo Sindicato da Região</text:p>
        </text:list-item>
      </text:list>
      <text:p text:style-name="P338"/>
      <text:p text:style-name="P339">OU</text:p>
      <text:p text:style-name="P340"/>
      <text:p text:style-name="P341">E-SOCIAL</text:p>
      <text:p text:style-name="P342"/>
      <text:list text:style-name="LFO7" text:continue-numbering="true">
        <text:list-item>
          <text:p text:style-name="P343">Dados do profissional<text:s/></text:p>
        </text:list-item>
        <text:list-item>
          <text:p text:style-name="P344">função correta e CBO<text:s/></text:p>
        </text:list-item>
        <text:list-item>
          <text:p text:style-name="P345">CNPJ local de trabalho</text:p>
        </text:list-item>
        <text:list-item>
          <text:p text:style-name="P346">Remuneração de acordo com o piso homologado pelo Sindicato da Região</text:p>
        </text:list-item>
      </text:list>
      <text:p text:style-name="P347"/>
      <text:p text:style-name="P348">Observações de lançamentos no Sagicon:</text:p>
      <text:p text:style-name="P349">Inativar status 210</text:p>
      <text:p text:style-name="P350">Status 108 ingresso.</text:p>
      <text:p text:style-name="P351"><text:s/>Caso registro: 105 registro e 9452 recadastramento.</text:p>
      <text:p text:style-name="P352"><text:s text:c="13"/>Caso seja reabilitação de registro: status 106</text:p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soft-page-break/>
      <text:p text:style-name="P366">CONTRATO DE PRESTAÇÃO DE SERVIÇOS<text:s/></text:p>
      <text:p text:style-name="P367"/>
      <text:list text:style-name="LFO7" text:continue-numbering="true">
        <text:list-item>
          <text:p text:style-name="P368">Dados do contratante conferidos<text:s/></text:p>
        </text:list-item>
        <text:list-item>
          <text:p text:style-name="P369">Dados do contratado conferidos<text:s/></text:p>
        </text:list-item>
        <text:list-item>
          <text:p text:style-name="P370">Objeto do contrato condizente a atividade farmacêutica</text:p>
        </text:list-item>
        <text:list-item>
          <text:p text:style-name="P371">Vigência mínima de 90 dias Carga horária compatível →<text:s/></text:p>
        </text:list-item>
        <text:list-item>
          <text:p text:style-name="P372">Se carga horária &gt;6h/dia sem intervalo, deve constar essa condição no contrato. Exceto escala 12X36 (Para farmácias e distribuidoras será aceito somente mediante ao termo de acordo entre empregador e o contratado declarando intervalo na jornada diária)</text:p>
        </text:list-item>
        <text:list-item>
          <text:p text:style-name="P373">Assinaturas do contratante e contratado<text:s/></text:p>
        </text:list-item>
        <text:list-item>
          <text:p text:style-name="P374">Alvará de Profissional Autônomo - Dados do profissional conferidos Documento menciona atividade de Farmacêutico ou área da saúde Validade dentro do prazo - Possui assinatura ou código de validação.</text:p>
        </text:list-item>
      </text:list>
      <text:p text:style-name="P375"/>
      <text:p text:style-name="P376">Observações de lançamentos no Sagicon:</text:p>
      <text:p text:style-name="P377">Inativar status 210</text:p>
      <text:p text:style-name="P378">Status 108 ingresso.</text:p>
      <text:p text:style-name="P379"><text:s/>Caso registro: 105 registro e 9452 recadastramento.</text:p>
      <text:p text:style-name="P380"><text:span text:style-name="T381">Status 9 se houver vigência descrevendo a data início e fim. /<text:s/></text:span><text:span text:style-name="T382">Data Validade Certificado</text:span><text:span text:style-name="T383"><text:s/>/<text:s/></text:span><text:span text:style-name="T384">Data Vencto Contrato</text:span><text:span text:style-name="T385"> </text:span></text:p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>CONTRATO POR CREDENCIAMENTO DE EMPRESAS TERCEIRAS COM ÓRGÃOS PÚBLICOS.</text:p>
      <text:p text:style-name="P410"/>
      <text:p text:style-name="P411">1. Identificação das partes</text:p>
      <text:list text:style-name="LFO8" text:continue-numbering="true">
        <text:list-item>
          <text:p text:style-name="P412">Nome do<text:s/><text:span text:style-name="T413">órgão público</text:span><text:s/>contratante.</text:p>
        </text:list-item>
        <text:list-item>
          <text:p text:style-name="P414">Nome da<text:s/><text:span text:style-name="T415">empresa credenciada</text:span><text:s/>(razão social).</text:p>
        </text:list-item>
        <text:list-item>
          <text:p text:style-name="P416">CNPJ, endereço, representante legal.</text:p>
        </text:list-item>
      </text:list>
      <text:p text:style-name="P417">2. Objeto do contrato</text:p>
      <text:list text:style-name="LFO9" text:continue-numbering="true">
        <text:list-item>
          <text:p text:style-name="P418">Descrição clara do<text:s/><text:span text:style-name="T419">serviço ou produto</text:span><text:s/>que será prestado/fornecido.</text:p>
        </text:list-item>
      </text:list>
      <text:p text:style-name="P420">3. Condições de prestação dos serviços</text:p>
      <text:list text:style-name="LFO10" text:continue-numbering="true">
        <text:list-item>
          <text:p text:style-name="P421">Forma de execução.</text:p>
        </text:list-item>
        <text:list-item>
          <text:p text:style-name="P422">Vigência do contrato.</text:p>
        </text:list-item>
        <text:list-item>
          <text:p text:style-name="P423">Assinatura do contratante e contratado.</text:p>
        </text:list-item>
      </text:list>
      <text:p text:style-name="P424"/>
      <text:p text:style-name="P425">Na contratação do profissional com a empresa terceira poderá ser:</text:p>
      <text:list text:style-name="LFO10" text:continue-numbering="true">
        <text:list-item>
          <text:p text:style-name="P426"/>
        </text:list-item>
        <text:list-item>
          <text:p text:style-name="P427"><text:s/>- CTPS FÍSICA + Declaração de lotação (expedida pela empresa terceira informando o local de lotação do profissional)</text:p>
        </text:list-item>
        <text:list-item>
          <text:p text:style-name="P428"/>
        </text:list-item>
        <text:list-item>
          <text:p text:style-name="P429">- CTPS DIGITAL + Declaração de lotação (expedida pela empresa terceira informando o local de lotação do profissional)</text:p>
        </text:list-item>
        <text:list-item>
          <text:p text:style-name="P430"/>
        </text:list-item>
        <text:list-item>
          <text:p text:style-name="P431">- Contrato de prestação de serviços + Alvará de autônomo<text:s/></text:p>
        </text:list-item>
        <text:list-item>
          <text:p text:style-name="P432">Caso tenha validade deve ser de no mínimo 90 dias, caso seja menor, ficarão sem CRT</text:p>
        </text:list-item>
        <text:list-item>
          <text:p text:style-name="P433"/>
        </text:list-item>
        <text:list-item>
          <text:p text:style-name="P434">Observações de lançamentos no Sagicon:</text:p>
        </text:list-item>
      </text:list>
      <text:p text:style-name="P435">- Inativar status 210</text:p>
      <text:p text:style-name="P436">- Status 108 ingresso.</text:p>
      <text:p text:style-name="P437">- Caso registro: 105 registro e 9452 recadastramento.</text:p>
      <text:p text:style-name="P438"/>
      <text:p text:style-name="P439">- TERCEIRIZADO: Situação RT : terceirizado / tipo de vínculo: CTPS ou Contrato se for o caso.</text:p>
      <text:p text:style-name="P440">- STATUS:</text:p>
      <text:p text:style-name="P441">- Lançar: 9433 e status 9 se houver vigência descrevendo a data início e fim.</text:p>
      <text:p text:style-name="P442">- Inativar status 210</text:p>
      <text:p text:style-name="P443">- Status 108 ingresso.</text:p>
      <text:p text:style-name="P444">- Caso registro: 105 registro e 9452 recadastramento</text:p>
      <text:p text:style-name="P445"/>
      <text:p text:style-name="P446"/>
      <text:p text:style-name="Normal">CONTRATO DE PRESTAÇÃO DE SERVIÇOS COM TERCEIRIZAÇÃO COM EMPRESA PRIVADAS.</text:p>
      <text:list text:style-name="LFO7" text:continue-numbering="true">
        <text:list-item>
          <text:p text:style-name="P447">Dados do contratante<text:s/></text:p>
        </text:list-item>
        <text:list-item>
          <text:p text:style-name="P448">Dados do contratado<text:s/></text:p>
        </text:list-item>
        <text:list-item>
          <text:p text:style-name="P449">Objeto do contrato condizente a atividade farmacêutica</text:p>
        </text:list-item>
        <text:list-item>
          <text:p text:style-name="P450">Vigência mínima de 90 dias.</text:p>
        </text:list-item>
        <text:list-item>
          <text:p text:style-name="P451">Contrato social da empresa terceirizada<text:s/><text:span text:style-name="T452">contendo o CNAE 8650-0/99</text:span></text:p>
        </text:list-item>
        <text:list-item>
          <text:p text:style-name="P453">Assinaturas do contratante e contratado<text:s/></text:p>
        </text:list-item>
      </text:list>
      <text:p text:style-name="P454"/>
      <text:p text:style-name="P455">Na contratação do profissional com a empresa terceira poderá ser:</text:p>
      <text:p text:style-name="P456"/>
      <text:p text:style-name="P457"><text:s/>- CTPS FÍSICA + Declaração de lotação (expedida pela empresa terceira informando o local de lotação do profissional)</text:p>
      <text:p text:style-name="P458"/>
      <text:p text:style-name="P459">- CTPS DIGITAL + Declaração de lotação (expedida pela empresa terceira informando o local de lotação do profissional)</text:p>
      <text:p text:style-name="P460"/>
      <text:p text:style-name="P461">- Contrato de prestação de serviços + Alvará de autônomo</text:p>
      <text:p text:style-name="P462"/>
      <text:p text:style-name="P463">Observações de lançamentos no Sagicon:</text:p>
      <text:p text:style-name="P464">- Inativar status 210</text:p>
      <text:p text:style-name="P465">- Status 108 ingresso.</text:p>
      <text:p text:style-name="P466"><text:s/>- Caso registro: 105 registro e 9452 recadastramento.</text:p>
      <text:p text:style-name="P467"/>
      <text:p text:style-name="P468">- TERCEIRIZADO: Situação RT : terceirizado / tipo de vínculo: CTPS ou Contrato <text:s text:c="2"/>de prestação de serviço (dependo do documento apresentado).</text:p>
      <text:p text:style-name="P469"><text:s text:c="2"/>STATUS:</text:p>
      <text:p text:style-name="P470">- Lançar: 9433 e status 9 se houver vigência descrevendo a data início e fim.</text:p>
      <text:p text:style-name="P471">- Inativar status 210</text:p>
      <text:p text:style-name="P472">- Status 108 ingresso.</text:p>
      <text:p text:style-name="P473"><text:span text:style-name="T474">- Caso registro: 105 registro e 9452 recadastramento</text:span>.</text:p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>VÍNCULO SERVIDOR PÚBLICO.</text:p>
      <text:p text:style-name="P486"/>
      <text:p text:style-name="P487"><text:s/>Nomeação ou Decreto ou Equivalente de nomeação, publicado em Diário Oficial.</text:p>
      <text:p text:style-name="Normal">Caso a contratação for através de Processo Seletivo Simplificado, deverá apresentar:</text:p>
      <text:list text:style-name="LFO7" text:continue-numbering="true">
        <text:list-item>
          <text:p text:style-name="P488">Dados do contratante.<text:s/></text:p>
        </text:list-item>
        <text:list-item>
          <text:p text:style-name="P489">Dados do contratado.<text:s/></text:p>
        </text:list-item>
        <text:list-item>
          <text:p text:style-name="P490">Objeto do contrato condizente a atividade farmacêutica</text:p>
        </text:list-item>
        <text:list-item>
          <text:p text:style-name="P491">Vigência mínima de 90 dias Carga horária compatível <text:s/></text:p>
        </text:list-item>
        <text:list-item>
          <text:p text:style-name="P492">Se carga horária &gt;6h/dia - Exceto escala 12X36</text:p>
        </text:list-item>
        <text:list-item>
          <text:p text:style-name="P493">Assinaturas do contratante e contratado<text:s/></text:p>
        </text:list-item>
      </text:list>
      <text:p text:style-name="Normal"/>
      <text:p text:style-name="P494">Observações de lançamentos no Sagicon:</text:p>
      <text:p text:style-name="P495">Inativar status 210</text:p>
      <text:p text:style-name="P496">Status 108 ingresso.</text:p>
      <text:p text:style-name="P497"><text:s/>Caso registro: 105 registro e 9452 recadastramento.</text:p>
      <text:p text:style-name="P498"><text:s text:c="13"/>Caso seja reabilitação de registro: status 106</text:p>
      <text:p text:style-name="Normal"/>
      <text:p text:style-name="Normal"/>
      <text:p text:style-name="Normal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>REQUERIMENTO DO ESTABELECIMENTO<text:s/></text:p>
      <text:p text:style-name="P517">- Razão social</text:p>
      <text:p text:style-name="P518">- Nome Fantasia</text:p>
      <text:p text:style-name="P519">- Dados de contato (endereço / telefone / e-mail)</text:p>
      <text:p text:style-name="P520">- Selecionado alteração de horário</text:p>
      <text:p text:style-name="P521">- Emitido pelo atual Diretor Técnico</text:p>
      <text:p text:style-name="P522">- Emitido em até 30 dias anterior ao protocolo</text:p>
      <text:p text:style-name="P523">- Ramo de atividade igual ou alterado<text:s/></text:p>
      <text:p text:style-name="P524">- Códigos de validação legíveis</text:p>
      <text:p text:style-name="P525"/>
      <text:p text:style-name="P526"/>
      <text:p text:style-name="P527">TIPO DE ESTABELECIMENTO</text:p>
      <text:list text:style-name="LFO5" text:continue-numbering="true">
        <text:list-item>
          <text:p text:style-name="P528">Manipulação Alopática</text:p>
        </text:list-item>
      </text:list>
      <text:p text:style-name="P529"><text:span text:style-name="T530">-<text:s/></text:span>Verificar se está assinalado “alopatia”</text:p>
      <text:p text:style-name="P531"/>
      <text:list text:style-name="LFO5" text:continue-numbering="true">
        <text:list-item>
          <text:p text:style-name="P532">Manipulação Homeopática</text:p>
        </text:list-item>
      </text:list>
      <text:p text:style-name="P533">- Verificar se está assinalado “homeopatia”</text:p>
      <text:p text:style-name="P534"/>
      <text:list text:style-name="LFO5" text:continue-numbering="true">
        <text:list-item>
          <text:p text:style-name="P535">Manipulação Alopática e Homeopática</text:p>
        </text:list-item>
      </text:list>
      <text:p text:style-name="P536">- Verificar se está assinalado “alopatia e homeopatia”</text:p>
      <text:p text:style-name="P537">- Horário dos dois laboratórios</text:p>
      <text:p text:style-name="P538">- Informado qual profissional será responsável pelos laboratórios</text:p>
      <text:p text:style-name="P539"><text:span text:style-name="T540">- Verificar se o profissional informado na Homeopatia possui habilitação.</text:span></text:p>
      <text:p text:style-name="P541"/>
      <text:list text:style-name="LFO5" text:continue-numbering="true">
        <text:list-item>
          <text:p text:style-name="P542">Farmácia Hospitalar</text:p>
        </text:list-item>
      </text:list>
      <text:p text:style-name="P543">- Tipo do estabelecimento<text:s/></text:p>
      <text:p text:style-name="P544">- Especialidade</text:p>
      <text:p text:style-name="P545">- Número de leitos<text:s/></text:p>
      <text:p text:style-name="P546"/>
      <text:list text:style-name="LFO5" text:continue-numbering="true">
        <text:list-item>
          <text:p text:style-name="P547">Indústrias</text:p>
        </text:list-item>
      </text:list>
      <text:p text:style-name="P548">- Tipo de Indústria</text:p>
      <text:p text:style-name="P549">- Horário de produção</text:p>
      <text:p text:style-name="P550"/>
      <text:list text:style-name="LFO5" text:continue-numbering="true">
        <text:list-item>
          <text:p text:style-name="P551">Laboratório Industrial / Controle de qualidade / Esterilização / De pesquisa</text:p>
        </text:list-item>
      </text:list>
      <text:p text:style-name="P552">- Tipo de Laboratório</text:p>
      <text:p text:style-name="P553">- Horário de produção</text:p>
      <text:p text:style-name="P554"/>
      <text:p text:style-name="P555"/>
      <text:p text:style-name="P556">TERMO DE COMPROMISSO</text:p>
      <text:soft-page-break/>
      <text:p text:style-name="P557">- Nome correto</text:p>
      <text:p text:style-name="P558">- CNPJ e nome fantasia corretos</text:p>
      <text:p text:style-name="P559">- Endereço atualizado ou solicitado atualização</text:p>
      <text:p text:style-name="P560">- Modalidade correta</text:p>
      <text:p text:style-name="P561">- Horário declaro até 10 horas por dia</text:p>
      <text:p text:style-name="P562">- Acima de 06 horas com intervalo<text:s/></text:p>
      <text:p text:style-name="P563">- Emitido em até 30 dias anterior ao protocolo</text:p>
      <text:p text:style-name="P564">- Códigos de validação legíveis</text:p>
      <text:p text:style-name="P5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2F5496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2F5496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F5496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2F5496" fo:letter-spacing="0.0034in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SimSun" style:font-name-complex="Arial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el Vicente De Souza</meta:initial-creator>
    <dc:creator>Melany Caroline De Souza Ribeiro</dc:creator>
    <meta:creation-date>2025-12-04T12:03:00Z</meta:creation-date>
    <dc:date>2025-12-11T14:34:00Z</dc:date>
    <meta:template xlink:href="Normal.dotm" xlink:type="simple"/>
    <meta:editing-cycles>8</meta:editing-cycles>
    <meta:editing-duration>PT13860S</meta:editing-duration>
    <meta:document-statistic meta:page-count="14" meta:paragraph-count="36" meta:word-count="2850" meta:character-count="18208" meta:row-count="128" meta:non-whitespace-character-count="15394"/>
  </office:meta>
</office:document-meta>
</file>